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75" calcext:value-type="float">
            <text:p>1675</text:p>
          </table:table-cell>
          <table:table-cell table:style-name="ce7" table:formula="of:=COUNTIF([.B7:.B999998];&quot;X&quot;)" office:value-type="float" office:value="1472" calcext:value-type="float">
            <text:p>1472</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9" calcext:value-type="float">
            <text:p>10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8" calcext:value-type="float">
            <text:p>188</text:p>
          </table:table-cell>
          <table:table-cell table:style-name="ce25" table:formula="of:=SUM([.B2:.F2])" office:value-type="float" office:value="1797" calcext:value-type="float">
            <text:p>17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89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 style:data-style-name="N2" text:time-value="23:23:48.6930873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4T23:24:28.938971717</dc:date>
    <meta:editing-duration>P1DT18H14M10S</meta:editing-duration>
    <meta:editing-cycles>1672</meta:editing-cycles>
    <meta:document-statistic meta:table-count="1" meta:cell-count="10135" meta:object-count="0"/>
  </office:meta>
</office:document-meta>
</file>