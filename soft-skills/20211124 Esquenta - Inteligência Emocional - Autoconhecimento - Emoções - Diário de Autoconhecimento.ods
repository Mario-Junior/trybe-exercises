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54" calcext:value-type="float">
            <text:p>1654</text:p>
          </table:table-cell>
          <table:table-cell table:style-name="ce7" table:formula="of:=COUNTIF([.B7:.B999998];&quot;X&quot;)" office:value-type="float" office:value="1455" calcext:value-type="float">
            <text:p>1455</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4" calcext:value-type="float">
            <text:p>10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4" calcext:value-type="float">
            <text:p>184</text:p>
          </table:table-cell>
          <table:table-cell table:style-name="ce25" table:formula="of:=SUM([.B2:.F2])" office:value-type="float" office:value="1771" calcext:value-type="float">
            <text:p>177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31]+1" office:value-type="date" office:date-value="2026-05-26" calcext:value-type="date">
            <text:p>2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desbloqueando mais habil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32]+1" office:value-type="date" office:date-value="2026-05-27" calcext:value-type="date">
            <text:p>2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lguns sustos por dois incidentes e, O Senhor nos sustém e cuida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5">
          <table:table-cell table:style-name="ce18" table:formula="of:=[.A1633]+1" office:value-type="date" office:date-value="2026-05-28" calcext:value-type="date">
            <text:p>2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Tive a honra de conhecer pessoalmente o ilustre Jonatas Maximiano, da Stone. E, recuperando,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5">
          <table:table-cell table:style-name="ce18" table:formula="of:=[.A1634]+1" office:value-type="date" office:date-value="2026-05-29" calcext:value-type="date">
            <text:p>29/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e, pois o procedimento de minha esposa correu bem, porém, com medo, pois, não foi possível extrair tudo e ela terá que volt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35]+1" office:value-type="date" office:date-value="2026-05-30" calcext:value-type="date">
            <text:p>3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ministrei palavras de louvor e adoração.</text:p>
          </table:table-cell>
          <table:table-cell table:number-columns-repeated="1014"/>
        </table:table-row>
        <table:table-row table:style-name="ro13">
          <table:table-cell table:style-name="ce18" table:formula="of:=[.A1636]+1" office:value-type="date" office:date-value="2026-05-31" calcext:value-type="date">
            <text:p>3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pamonha.</text:p>
          </table:table-cell>
          <table:table-cell table:number-columns-repeated="1014"/>
        </table:table-row>
        <table:table-row table:style-name="ro13">
          <table:table-cell table:style-name="ce18" table:formula="of:=[.A1637]+1" office:value-type="date" office:date-value="2026-06-01" calcext:value-type="date">
            <text:p>0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Rompendo em Fé na situação da questão de saúde de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muito abençoada Palavra sobre Perdão no PG.</text:p>
          </table:table-cell>
          <table:table-cell table:number-columns-repeated="1014"/>
        </table:table-row>
        <table:table-row table:style-name="ro13">
          <table:table-cell table:style-name="ce18" table:formula="of:=[.A1638]+1" office:value-type="date" office:date-value="2026-06-02" calcext:value-type="date">
            <text:p>0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39]+1" office:value-type="date" office:date-value="2026-06-03" calcext:value-type="date">
            <text:p>03/06/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Tô triste com a situação de minha esposa e (bem) cansado, porém, Cristo tem sido sempre minha fortalez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40]+1" office:value-type="date" office:date-value="2026-06-04" calcext:value-type="date">
            <text:p>0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descan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41]+1" office:value-type="date" office:date-value="2026-06-05" calcext:value-type="date">
            <text:p>0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Ponte de feriad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2]+1" office:value-type="date" office:date-value="2026-06-06" calcext:value-type="date">
            <text:p>0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Um dia de autocuidado.</text:p>
          </table:table-cell>
          <table:table-cell table:number-columns-repeated="1014"/>
        </table:table-row>
        <table:table-row table:style-name="ro13">
          <table:table-cell table:style-name="ce18" table:formula="of:=[.A1643]+1" office:value-type="date" office:date-value="2026-06-07" calcext:value-type="date">
            <text:p>0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unção e da Graça dO nosso Senhor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44]+1" office:value-type="date" office:date-value="2026-06-08" calcext:value-type="date">
            <text:p>0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45]+1" office:value-type="date" office:date-value="2026-06-09" calcext:value-type="date">
            <text:p>0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a entrega que estava agarrada no trabalho e já peguei outro Bug pra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 dei um descanso.</text:p>
          </table:table-cell>
          <table:table-cell table:number-columns-repeated="1014"/>
        </table:table-row>
        <table:table-row table:style-name="ro2">
          <table:table-cell table:style-name="ce18" table:formula="of:=[.A1646]+1" office:value-type="date" office:date-value="2026-06-10" calcext:value-type="date">
            <text:p>1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47]+1" office:value-type="date" office:date-value="2026-06-11" calcext:value-type="date">
            <text:p>1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identificar muitas oportunidades e colaborar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8]+1" office:value-type="date" office:date-value="2026-06-12" calcext:value-type="date">
            <text:p>1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resolver muitas coisas e sigo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649]+1" office:value-type="date" office:date-value="2026-06-13" calcext:value-type="date">
            <text:p>1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com muita alegria e deliciosos momentos de comunhão em família e com irmã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0]+1" office:value-type="date" office:date-value="2026-06-14" calcext:value-type="date">
            <text:p>1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651]+1" office:value-type="date" office:date-value="2026-06-15" calcext:value-type="date">
            <text:p>1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52]+1" office:value-type="date" office:date-value="2026-06-16" calcext:value-type="date">
            <text:p>1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53]+1" office:value-type="date" office:date-value="2026-06-17" calcext:value-type="date">
            <text:p>1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sisti ao culto “Sobre A Mesa” e depois ministrei louvores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4]+1" office:value-type="date" office:date-value="2026-06-18" calcext:value-type="date">
            <text:p>1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o nosso querido irmão, amigo e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5]+1" office:value-type="date" office:date-value="2026-06-19" calcext:value-type="date">
            <text:p>1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olhando pra já começar minha pós-graduação Tech.</text:p>
          </table:table-cell>
          <table:table-cell table:number-columns-repeated="1014"/>
        </table:table-row>
        <table:table-row table:style-name="ro10">
          <table:table-cell table:style-name="ce18" table:formula="of:=[.A1656]+1" office:value-type="date" office:date-value="2026-06-20" calcext:value-type="date">
            <text:p>2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muita alegria. Aniversários do nosso irmãozão Elielson e do paizinho dele, comemoração com costelada ao fogo de chão, além do Café de homens com Cristo, onde ministrei e fui ministrado por muitas palavras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7]+1" office:value-type="date" office:date-value="2026-06-21" calcext:value-type="date">
            <text:p>2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58]+1" office:value-type="date" office:date-value="2026-06-22" calcext:value-type="date">
            <text:p>2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as entregas, um 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59]+1" office:value-type="date" office:date-value="2026-06-23" calcext:value-type="date">
            <text:p>2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danças lindas de minha filha na festinha caipira da escola e estar em família e irmãos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3" table:number-rows-repeated="1046915">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6-23">00/00/0000</text:date>, <text:time style:data-style-name="N2" text:time-value="22:25:59.78459255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6-23T22:27:00.345364062</dc:date>
    <meta:editing-duration>P1DT17H56M41S</meta:editing-duration>
    <meta:editing-cycles>1655</meta:editing-cycles>
    <meta:document-statistic meta:table-count="1" meta:cell-count="10004" meta:object-count="0"/>
  </office:meta>
</office:document-meta>
</file>