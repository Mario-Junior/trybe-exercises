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35" calcext:value-type="float">
            <text:p>1635</text:p>
          </table:table-cell>
          <table:table-cell table:style-name="ce7" table:formula="of:=COUNTIF([.B7:.B999998];&quot;X&quot;)" office:value-type="float" office:value="1436" calcext:value-type="float">
            <text:p>1436</text:p>
          </table:table-cell>
          <table:table-cell table:style-name="ce7" table:formula="of:=COUNTIF([.C7:.C999998];&quot;X&quot;)" office:value-type="float" office:value="27" calcext:value-type="float">
            <text:p>27</text:p>
          </table:table-cell>
          <table:table-cell table:style-name="ce7" table:formula="of:=COUNTIF([.D7:.D999998];&quot;X&quot;)" office:value-type="float" office:value="104" calcext:value-type="float">
            <text:p>10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4" calcext:value-type="float">
            <text:p>184</text:p>
          </table:table-cell>
          <table:table-cell table:style-name="ce25" table:formula="of:=SUM([.B2:.F2])" office:value-type="float" office:value="1752" calcext:value-type="float">
            <text:p>17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7">
          <table:table-cell table:style-name="ce18" table:formula="of:=[.A1612]+1" office:value-type="date" office:date-value="2026-05-07" calcext:value-type="date">
            <text:p>0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ntem no final da noite, tomei um grande susto, um confronto com uma pessoa maluca, que me ameaçou de morte, dentro da academia, por motivo totalmente fútil. Mas, Deus sempre É maior e nos deu o livrament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3]+1" office:value-type="date" office:date-value="2026-05-08" calcext:value-type="date">
            <text:p>0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to sou por tudo o que O Senhor tem feito por nós e através de nó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6">
          <table:table-cell table:style-name="ce18" table:formula="of:=[.A1614]+1" office:value-type="date" office:date-value="2026-05-09" calcext:value-type="date">
            <text:p>0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cheio de bênçãos, alegrias e muitos feitos e preparativos para nosso almoço para o Dia das Mã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hurros.</text:p>
          </table:table-cell>
          <table:table-cell table:number-columns-repeated="1014"/>
        </table:table-row>
        <table:table-row table:style-name="ro14">
          <table:table-cell table:style-name="ce18" table:formula="of:=[.A1615]+1" office:value-type="date" office:date-value="2026-05-10" calcext:value-type="date">
            <text:p>1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Que dia repleto de bênçãos e alegrias, conseguimos reunir meus pais e irmão e uma de minhas tias, fiz um maravilhoso almoço em comemoração ao Dia das Mães, passamos o dia em família e, a noite, ainda fui abençoado e abençoei várias vidas, sendo usado poderosamente no louv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16]+1" office:value-type="date" office:date-value="2026-05-11" calcext:value-type="date">
            <text:p>1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ões e aprendizados consta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617]+1" office:value-type="date" office:date-value="2026-05-12" calcext:value-type="date">
            <text:p>1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Preparativos para as comemorações de aniversário de 4 anos da nossa Congreg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8">
          <table:table-cell table:style-name="ce18" table:formula="of:=[.A1618]+1" office:value-type="date" office:date-value="2026-05-13" calcext:value-type="date">
            <text:p>1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1 das comemorações do aniversário de 4 anos da nossa Congregação. Foi nítido o derramar do Espírito Santo de Deus em meio ao nossos irmãs e irm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8">
          <table:table-cell table:style-name="ce18" table:formula="of:=[.A1619]+1" office:value-type="date" office:date-value="2026-05-14" calcext:value-type="date">
            <text:p>1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2 das comemorações do aniversário de 4 anos da nossa Congregação, bênçãos e mais bênçãos e o derramar do Espírito Santo mais um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8">
          <table:table-cell table:style-name="ce18" table:formula="of:=[.A1620]+1" office:value-type="date" office:date-value="2026-05-15" calcext:value-type="date">
            <text:p>1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3 das comemorações do aniversário de 4 anos da nossa Congregação, muitas bênçãos em nosso jantar de confraternização dos servas e servos ao noss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621]+1" office:value-type="date" office:date-value="2026-05-16" calcext:value-type="date">
            <text:p>1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2]+1" office:value-type="date" office:date-value="2026-05-17" calcext:value-type="date">
            <text:p>17/05/2026</text:p>
          </table:table-cell>
          <table:table-cell table:style-name="ce28" office:value-type="string" calcext:value-type="string">
            <text:p>X</text:p>
          </table:table-cell>
          <table:table-cell table:style-name="ce28" table:number-columns-repeated="4"/>
          <table:table-cell table:style-name="ce42" office:value-type="string" calcext:value-type="string">
            <text:p>Novo dia cheio de bênçãos e muito alegr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5">
          <table:table-cell table:style-name="ce18" table:formula="of:=[.A1623]+1" office:value-type="date" office:date-value="2026-05-18" calcext:value-type="date">
            <text:p>18/05/2026</text:p>
          </table:table-cell>
          <table:table-cell table:number-columns-repeated="2" table:style-name="ce28" office:value-type="string" calcext:value-type="string">
            <text:p>X</text:p>
          </table:table-cell>
          <table:table-cell table:style-name="ce28" table:number-columns-repeated="3"/>
          <table:table-cell table:style-name="ce42" office:value-type="string" calcext:value-type="string">
            <text:p>Dia com algumas bênçãos, porém, meio agarrado, devido crise de rinite/sinusite e internet da Algar bicha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uita oração abençoadora no PG.</text:p>
          </table:table-cell>
          <table:table-cell table:number-columns-repeated="1014"/>
        </table:table-row>
        <table:table-row table:style-name="ro6">
          <table:table-cell table:style-name="ce18" table:formula="of:=[.A1624]+1" office:value-type="date" office:date-value="2026-05-19" calcext:value-type="date">
            <text:p>19/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cuperar um pouco do trabalho agarrado do dia anterior. E, dia de cozinhar comida delici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arne louca.</text:p>
          </table:table-cell>
          <table:table-cell table:number-columns-repeated="1014"/>
        </table:table-row>
        <table:table-row table:style-name="ro2">
          <table:table-cell table:style-name="ce18" table:formula="of:=[.A1625]+1" office:value-type="date" office:date-value="2026-05-20" calcext:value-type="date">
            <text:p>2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26]+1" office:value-type="date" office:date-value="2026-05-21" calcext:value-type="date">
            <text:p>2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Bons resultado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27]+1" office:value-type="date" office:date-value="2026-05-22" calcext:value-type="date">
            <text:p>2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28]+1" office:value-type="date" office:date-value="2026-05-23" calcext:value-type="date">
            <text:p>2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6">
          <table:table-cell table:style-name="ce18" table:formula="of:=[.A1629]+1" office:value-type="date" office:date-value="2026-05-24" calcext:value-type="date">
            <text:p>2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usado poderosamente na igreja para o louvor e ministração dA Palavra de Deus.</text:p>
          </table:table-cell>
          <table:table-cell table:number-columns-repeated="1014"/>
        </table:table-row>
        <table:table-row table:style-name="ro13">
          <table:table-cell table:style-name="ce18" table:formula="of:=[.A1630]+1" office:value-type="date" office:date-value="2026-05-25" calcext:value-type="date">
            <text:p>2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muito no trabalho e na academ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31]+1" office:value-type="date" office:date-value="2026-05-26" calcext:value-type="date">
            <text:p>2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desbloqueando mais habil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6">
          <table:table-cell table:style-name="ce18" table:formula="of:=[.A1632]+1" office:value-type="date" office:date-value="2026-05-27" calcext:value-type="date">
            <text:p>27/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lguns sustos por dois incidentes e, O Senhor nos sustém e cuida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number-columns-repeated="1014"/>
        </table:table-row>
        <table:table-row table:style-name="ro5">
          <table:table-cell table:style-name="ce18" table:formula="of:=[.A1633]+1" office:value-type="date" office:date-value="2026-05-28" calcext:value-type="date">
            <text:p>28/05/2026</text:p>
          </table:table-cell>
          <table:table-cell table:style-name="ce28" office:value-type="string" calcext:value-type="string">
            <text:p>X</text:p>
          </table:table-cell>
          <table:table-cell table:style-name="ce28" table:number-columns-repeated="4"/>
          <table:table-cell table:style-name="ce42" office:value-type="string" calcext:value-type="string">
            <text:p>Tive a honra de conhecer pessoalmente o ilustre Jonatas Maximiano, da Stone. E, recuperando,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5">
          <table:table-cell table:style-name="ce18" table:formula="of:=[.A1634]+1" office:value-type="date" office:date-value="2026-05-29" calcext:value-type="date">
            <text:p>29/05/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legre, pois o procedimento de minha esposa correu bem, porém, com medo, pois, não foi possível extrair tudo e ela terá que volt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635]+1" office:value-type="date" office:date-value="2026-05-30" calcext:value-type="date">
            <text:p>30/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ministrei palavras de louvor e adoração.</text:p>
          </table:table-cell>
          <table:table-cell table:number-columns-repeated="1014"/>
        </table:table-row>
        <table:table-row table:style-name="ro13">
          <table:table-cell table:style-name="ce18" table:formula="of:=[.A1636]+1" office:value-type="date" office:date-value="2026-05-31" calcext:value-type="date">
            <text:p>3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uito abençoado, entre irmãos 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pamonha.</text:p>
          </table:table-cell>
          <table:table-cell table:number-columns-repeated="1014"/>
        </table:table-row>
        <table:table-row table:style-name="ro13">
          <table:table-cell table:style-name="ce18" table:formula="of:=[.A1637]+1" office:value-type="date" office:date-value="2026-06-01" calcext:value-type="date">
            <text:p>01/06/2026</text:p>
          </table:table-cell>
          <table:table-cell table:style-name="ce28" office:value-type="string" calcext:value-type="string">
            <text:p>X</text:p>
          </table:table-cell>
          <table:table-cell table:style-name="ce28" table:number-columns-repeated="4"/>
          <table:table-cell table:style-name="ce42" office:value-type="string" calcext:value-type="string">
            <text:p>Rompendo em Fé na situação da questão de saúde de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muito abençoada Palavra sobre Perdão no PG.</text:p>
          </table:table-cell>
          <table:table-cell table:number-columns-repeated="1014"/>
        </table:table-row>
        <table:table-row table:style-name="ro13">
          <table:table-cell table:style-name="ce18" table:formula="of:=[.A1638]+1" office:value-type="date" office:date-value="2026-06-02" calcext:value-type="date">
            <text:p>02/06/2026</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um pouco agarrado e corrido, porém, repleto de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39]+1" office:value-type="date" office:date-value="2026-06-03" calcext:value-type="date">
            <text:p>03/06/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Tô triste com a situação de minha esposa e (bem) cansado, porém, Cristo tem sido sempre minha fortalez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640]+1" office:value-type="date" office:date-value="2026-06-04" calcext:value-type="date">
            <text:p>04/06/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descan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93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6-04">00/00/0000</text:date>, <text:time style:data-style-name="N2" text:time-value="18:32:16.13231502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6-04T18:32:37.595292256</dc:date>
    <meta:editing-duration>P1DT17H35M31S</meta:editing-duration>
    <meta:editing-cycles>1636</meta:editing-cycles>
    <meta:document-statistic meta:table-count="1" meta:cell-count="9890" meta:object-count="0"/>
  </office:meta>
</office:document-meta>
</file>