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66" calcext:value-type="float">
            <text:p>1666</text:p>
          </table:table-cell>
          <table:table-cell table:style-name="ce7" table:formula="of:=COUNTIF([.B7:.B999998];&quot;X&quot;)" office:value-type="float" office:value="1465" calcext:value-type="float">
            <text:p>1465</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8" calcext:value-type="float">
            <text:p>10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6" calcext:value-type="float">
            <text:p>186</text:p>
          </table:table-cell>
          <table:table-cell table:style-name="ce25" table:formula="of:=SUM([.B2:.F2])" office:value-type="float" office:value="1787" calcext:value-type="float">
            <text:p>178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2">
          <table:table-cell table:style-name="ce18" table:formula="of:=[.A1661]+1" office:value-type="date" office:date-value="2026-06-25" calcext:value-type="date">
            <text:p>2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662]+1" office:value-type="date" office:date-value="2026-06-26" calcext:value-type="date">
            <text:p>2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663]+1" office:value-type="date" office:date-value="2026-06-27" calcext:value-type="date">
            <text:p>27/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Correria, trabalhos da faculdade me fazendo dormir mal e pouquíssi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64]+1" office:value-type="date" office:date-value="2026-06-28" calcext:value-type="date">
            <text:p>28/06/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niversário de 72 anos de minha amada Mãe nos proporcionando muita alegria. Porém, os trabalhos da faculdade muito pesados me causando medo de não conseguir entregar e ainda ser reprovado nas disciplin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65]+1" office:value-type="date" office:date-value="2026-06-29" calcext:value-type="date">
            <text:p>29/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Passei o dia todo mal, apurado pra conseguir concluir os trabalhos da faculdade, entreguei nos últimos minutos com qualidade bem a quem do que eu gostar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666]+1" office:value-type="date" office:date-value="2026-06-30" calcext:value-type="date">
            <text:p>3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67]+1" office:value-type="date" office:date-value="2026-07-01" calcext:value-type="date">
            <text:p>0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68]+1" office:value-type="date" office:date-value="2026-07-02" calcext:value-type="date">
            <text:p>0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sanduíche assado.</text:p>
          </table:table-cell>
          <table:table-cell table:number-columns-repeated="1014"/>
        </table:table-row>
        <table:table-row table:style-name="ro5">
          <table:table-cell table:style-name="ce18" table:formula="of:=[.A1669]+1" office:value-type="date" office:date-value="2026-07-03" calcext:value-type="date">
            <text:p>03/07/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ia de um bom dia de trabalho e com elogios e medo dos problemas de energia aqui na nossa região, causando muitos transtor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zza.</text:p>
          </table:table-cell>
          <table:table-cell table:number-columns-repeated="1014"/>
        </table:table-row>
        <table:table-row table:style-name="ro13">
          <table:table-cell table:style-name="ce18" table:formula="of:=[.A1670]+1" office:value-type="date" office:date-value="2026-07-04" calcext:value-type="date">
            <text:p>04/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671]+1" office:value-type="date" office:date-value="2026-07-05" calcext:value-type="date">
            <text:p>0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abençoado e maravilhoso em família e com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90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05">00/00/0000</text:date>, <text:time style:data-style-name="N2" text:time-value="22:18:53.61372388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7-05T22:31:15.424838029</dc:date>
    <meta:editing-duration>P1DT18H7M46S</meta:editing-duration>
    <meta:editing-cycles>1664</meta:editing-cycles>
    <meta:document-statistic meta:table-count="1" meta:cell-count="10080" meta:object-count="0"/>
  </office:meta>
</office:document-meta>
</file>