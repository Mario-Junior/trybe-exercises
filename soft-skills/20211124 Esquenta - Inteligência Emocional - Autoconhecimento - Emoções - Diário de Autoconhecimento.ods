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6" calcext:value-type="float">
            <text:p>1606</text:p>
          </table:table-cell>
          <table:table-cell table:style-name="ce7" table:formula="of:=COUNTIF([.B7:.B999998];&quot;X&quot;)" office:value-type="float" office:value="1407" calcext:value-type="float">
            <text:p>1407</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7" calcext:value-type="float">
            <text:p>17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610]+1" office:value-type="date" office:date-value="2026-05-05" calcext:value-type="date">
            <text:p>05/05/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resoluções, com a direção dO nosso Deus, indo na frente, abrindo os caminhos, nos conduzindo.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13">
          <table:table-cell table:style-name="ce18" table:formula="of:=[.A1611]+1" office:value-type="date" office:date-value="2026-05-06" calcext:value-type="date">
            <text:p>06/05/2026</text:p>
          </table:table-cell>
          <table:table-cell table:style-name="ce28" office:value-type="string" calcext:value-type="string">
            <text:p>X</text:p>
          </table:table-cell>
          <table:table-cell table:style-name="ce28" table:number-columns-repeated="4"/>
          <table:table-cell table:style-name="ce42" office:value-type="string" calcext:value-type="string">
            <text:p>Cada dia melhor, com a graça de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6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6">00/00/0000</text:date>, <text:time style:data-style-name="N2" text:time-value="20:00:25.5970778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6T20:00:47.845911285</dc:date>
    <meta:editing-duration>P1DT16H57M5S</meta:editing-duration>
    <meta:editing-cycles>1606</meta:editing-cycles>
    <meta:document-statistic meta:table-count="1" meta:cell-count="9710" meta:object-count="0"/>
  </office:meta>
</office:document-meta>
</file>