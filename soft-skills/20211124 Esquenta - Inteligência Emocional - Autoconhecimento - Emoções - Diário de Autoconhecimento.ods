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68" calcext:value-type="float">
            <text:p>1668</text:p>
          </table:table-cell>
          <table:table-cell table:style-name="ce7" table:formula="of:=COUNTIF([.B7:.B999998];&quot;X&quot;)" office:value-type="float" office:value="1467" calcext:value-type="float">
            <text:p>1467</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8" calcext:value-type="float">
            <text:p>10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6" calcext:value-type="float">
            <text:p>186</text:p>
          </table:table-cell>
          <table:table-cell table:style-name="ce25" table:formula="of:=SUM([.B2:.F2])" office:value-type="float" office:value="1789" calcext:value-type="float">
            <text:p>178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73]+1" office:value-type="date" office:date-value="2026-07-07" calcext:value-type="date">
            <text:p>07/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foi um pouquinho bagunçado mas, tudo bem,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3" table:number-rows-repeated="104690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07">00/00/0000</text:date>, <text:time style:data-style-name="N2" text:time-value="19:40:43.7711979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07T19:41:51.718678440</dc:date>
    <meta:editing-duration>P1DT18H9M55S</meta:editing-duration>
    <meta:editing-cycles>1666</meta:editing-cycles>
    <meta:document-statistic meta:table-count="1" meta:cell-count="10092" meta:object-count="0"/>
  </office:meta>
</office:document-meta>
</file>