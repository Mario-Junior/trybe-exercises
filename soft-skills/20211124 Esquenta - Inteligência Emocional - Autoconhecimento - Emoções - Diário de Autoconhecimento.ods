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82" calcext:value-type="float">
            <text:p>1682</text:p>
          </table:table-cell>
          <table:table-cell table:style-name="ce7" table:formula="of:=COUNTIF([.B7:.B999998];&quot;X&quot;)" office:value-type="float" office:value="1477" calcext:value-type="float">
            <text:p>1477</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10" calcext:value-type="float">
            <text:p>11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90" calcext:value-type="float">
            <text:p>190</text:p>
          </table:table-cell>
          <table:table-cell table:style-name="ce25" table:formula="of:=SUM([.B2:.F2])" office:value-type="float" office:value="1805" calcext:value-type="float">
            <text:p>18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7">
          <table:table-cell table:style-name="ce18" table:formula="of:=[.A1685]+1" office:value-type="date" office:date-value="2026-07-19" calcext:value-type="date">
            <text:p>19/07/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Sim, duas emoções distintas, um bom dia em família porém, com aquela tristeza de ter tantas coisas por fazer, não conseguir evoluir e estar me sentindo perdido. Deus, eu tava tão bem até esses dias, porque i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686]+1" office:value-type="date" office:date-value="2026-07-20" calcext:value-type="date">
            <text:p>20/07/2026</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Pai, por favor, me conduz, eu te imploro, me faz superar este momento e recuperar a ord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87]+1" office:value-type="date" office:date-value="2026-07-21" calcext:value-type="date">
            <text:p>2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8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1">00/00/0000</text:date>, <text:time style:data-style-name="N2" text:time-value="19:43:51.1154290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21T19:44:24.851893306</dc:date>
    <meta:editing-duration>P1DT18H34M20S</meta:editing-duration>
    <meta:editing-cycles>1679</meta:editing-cycles>
    <meta:document-statistic meta:table-count="1" meta:cell-count="10178" meta:object-count="0"/>
  </office:meta>
</office:document-meta>
</file>