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8" calcext:value-type="float">
            <text:p>1628</text:p>
          </table:table-cell>
          <table:table-cell table:style-name="ce7" table:formula="of:=COUNTIF([.B7:.B999998];&quot;X&quot;)" office:value-type="float" office:value="1429" calcext:value-type="float">
            <text:p>1429</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3" calcext:value-type="float">
            <text:p>10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3" calcext:value-type="float">
            <text:p>17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4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20:29:32.9381677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8T20:30:41.723840071</dc:date>
    <meta:editing-duration>P1DT17H21M13S</meta:editing-duration>
    <meta:editing-cycles>1628</meta:editing-cycles>
    <meta:document-statistic meta:table-count="1" meta:cell-count="9846" meta:object-count="0"/>
  </office:meta>
</office:document-meta>
</file>