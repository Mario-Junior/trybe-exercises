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3" calcext:value-type="float">
            <text:p>1653</text:p>
          </table:table-cell>
          <table:table-cell table:style-name="ce7" table:formula="of:=COUNTIF([.B7:.B999998];&quot;X&quot;)" office:value-type="float" office:value="1454" calcext:value-type="float">
            <text:p>1454</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70" calcext:value-type="float">
            <text:p>17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1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 style:data-style-name="N2" text:time-value="19:48:42.6175425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2T19:49:22.552291136</dc:date>
    <meta:editing-duration>P1DT17H55M40S</meta:editing-duration>
    <meta:editing-cycles>1654</meta:editing-cycles>
    <meta:document-statistic meta:table-count="1" meta:cell-count="9998" meta:object-count="0"/>
  </office:meta>
</office:document-meta>
</file>