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79" calcext:value-type="float">
            <text:p>1679</text:p>
          </table:table-cell>
          <table:table-cell table:style-name="ce7" table:formula="of:=COUNTIF([.B7:.B999998];&quot;X&quot;)" office:value-type="float" office:value="1475" calcext:value-type="float">
            <text:p>1475</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9" calcext:value-type="float">
            <text:p>109</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9" calcext:value-type="float">
            <text:p>189</text:p>
          </table:table-cell>
          <table:table-cell table:style-name="ce25" table:formula="of:=SUM([.B2:.F2])" office:value-type="float" office:value="1801" calcext:value-type="float">
            <text:p>180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58]+1" office:value-type="date" office:date-value="2026-06-22" calcext:value-type="date">
            <text:p>2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as entregas, um 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59]+1" office:value-type="date" office:date-value="2026-06-23" calcext:value-type="date">
            <text:p>2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danças lindas de minha filha na festinha caipira da escola e estar em família e irmãos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60]+1" office:value-type="date" office:date-value="2026-06-24" calcext:value-type="date">
            <text:p>2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poca.</text:p>
          </table:table-cell>
          <table:table-cell table:number-columns-repeated="1014"/>
        </table:table-row>
        <table:table-row table:style-name="ro2">
          <table:table-cell table:style-name="ce18" table:formula="of:=[.A1661]+1" office:value-type="date" office:date-value="2026-06-25" calcext:value-type="date">
            <text:p>2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662]+1" office:value-type="date" office:date-value="2026-06-26" calcext:value-type="date">
            <text:p>2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663]+1" office:value-type="date" office:date-value="2026-06-27" calcext:value-type="date">
            <text:p>27/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Correria, trabalhos da faculdade me fazendo dormir mal e pouquíssi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64]+1" office:value-type="date" office:date-value="2026-06-28" calcext:value-type="date">
            <text:p>28/06/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niversário de 72 anos de minha amada Mãe nos proporcionando muita alegria. Porém, os trabalhos da faculdade muito pesados me causando medo de não conseguir entregar e ainda ser reprovado nas disciplin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65]+1" office:value-type="date" office:date-value="2026-06-29" calcext:value-type="date">
            <text:p>29/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Passei o dia todo mal, apurado pra conseguir concluir os trabalhos da faculdade, entreguei nos últimos minutos com qualidade bem a quem do que eu gostar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666]+1" office:value-type="date" office:date-value="2026-06-30" calcext:value-type="date">
            <text:p>3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67]+1" office:value-type="date" office:date-value="2026-07-01" calcext:value-type="date">
            <text:p>0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68]+1" office:value-type="date" office:date-value="2026-07-02" calcext:value-type="date">
            <text:p>0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sanduíche assado.</text:p>
          </table:table-cell>
          <table:table-cell table:number-columns-repeated="1014"/>
        </table:table-row>
        <table:table-row table:style-name="ro5">
          <table:table-cell table:style-name="ce18" table:formula="of:=[.A1669]+1" office:value-type="date" office:date-value="2026-07-03" calcext:value-type="date">
            <text:p>03/07/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ia de um bom dia de trabalho e com elogios e medo dos problemas de energia aqui na nossa região, causando muitos transtor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zza.</text:p>
          </table:table-cell>
          <table:table-cell table:number-columns-repeated="1014"/>
        </table:table-row>
        <table:table-row table:style-name="ro13">
          <table:table-cell table:style-name="ce18" table:formula="of:=[.A1670]+1" office:value-type="date" office:date-value="2026-07-04" calcext:value-type="date">
            <text:p>04/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671]+1" office:value-type="date" office:date-value="2026-07-05" calcext:value-type="date">
            <text:p>05/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abençoado e maravilhoso em família e com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2]+1" office:value-type="date" office:date-value="2026-07-06" calcext:value-type="date">
            <text:p>06/07/2026</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o bom, dia repleto de produtiv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73]+1" office:value-type="date" office:date-value="2026-07-07" calcext:value-type="date">
            <text:p>07/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foi um pouquinho bagunçado mas, tudo bem,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74]+1" office:value-type="date" office:date-value="2026-07-08" calcext:value-type="date">
            <text:p>08/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75]+1" office:value-type="date" office:date-value="2026-07-09" calcext:value-type="date">
            <text:p>09/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6]+1" office:value-type="date" office:date-value="2026-07-10" calcext:value-type="date">
            <text:p>10/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77]+1" office:value-type="date" office:date-value="2026-07-11" calcext:value-type="date">
            <text:p>1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78]+1" office:value-type="date" office:date-value="2026-07-12" calcext:value-type="date">
            <text:p>1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79]+1" office:value-type="date" office:date-value="2026-07-13" calcext:value-type="date">
            <text:p>13/07/2026</text:p>
          </table:table-cell>
          <table:table-cell table:style-name="ce28" table:number-columns-repeated="4"/>
          <table:table-cell table:style-name="ce28" office:value-type="string" calcext:value-type="string">
            <text:p>X</text:p>
          </table:table-cell>
          <table:table-cell table:style-name="ce42" office:value-type="string" calcext:value-type="string">
            <text:p>Ah Deus, tava tudo indo tão abençoadamente bem mas, porque Senhor, do nada, essa tristeza, essa sensação de fraquez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80]+1" office:value-type="date" office:date-value="2026-07-14" calcext:value-type="date">
            <text:p>14/07/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voluindo as coisas do trabalho porém, com a mente e o corpo sentindo-me frac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81]+1" office:value-type="date" office:date-value="2026-07-15" calcext:value-type="date">
            <text:p>15/07/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me recuperando e evolu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82]+1" office:value-type="date" office:date-value="2026-07-16" calcext:value-type="date">
            <text:p>16/07/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me recuperando e evolu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83]+1" office:value-type="date" office:date-value="2026-07-17" calcext:value-type="date">
            <text:p>17/07/2026</text:p>
          </table:table-cell>
          <table:table-cell table:style-name="ce28" table:number-columns-repeated="4"/>
          <table:table-cell table:style-name="ce28" office:value-type="string" calcext:value-type="string">
            <text:p>X</text:p>
          </table:table-cell>
          <table:table-cell table:style-name="ce42" office:value-type="string" calcext:value-type="string">
            <text:p>Dia bastante agarr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84]+1" office:value-type="date" office:date-value="2026-07-18" calcext:value-type="date">
            <text:p>18/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689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7-18">00/00/0000</text:date>, <text:time style:data-style-name="N2" text:time-value="21:47:28.66270836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7-18T21:47:52.551100455</dc:date>
    <meta:editing-duration>P1DT18H31M5S</meta:editing-duration>
    <meta:editing-cycles>1676</meta:editing-cycles>
    <meta:document-statistic meta:table-count="1" meta:cell-count="10159" meta:object-count="0"/>
  </office:meta>
</office:document-meta>
</file>