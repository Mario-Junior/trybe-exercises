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63" calcext:value-type="float">
            <text:p>1663</text:p>
          </table:table-cell>
          <table:table-cell table:style-name="ce7" table:formula="of:=COUNTIF([.B7:.B999998];&quot;X&quot;)" office:value-type="float" office:value="1462" calcext:value-type="float">
            <text:p>1462</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7" calcext:value-type="float">
            <text:p>107</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6" calcext:value-type="float">
            <text:p>186</text:p>
          </table:table-cell>
          <table:table-cell table:style-name="ce25" table:formula="of:=SUM([.B2:.F2])" office:value-type="float" office:value="1783" calcext:value-type="float">
            <text:p>178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41]+1" office:value-type="date" office:date-value="2026-06-05" calcext:value-type="date">
            <text:p>0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Ponte de feriad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2]+1" office:value-type="date" office:date-value="2026-06-06" calcext:value-type="date">
            <text:p>0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Um dia de autocuidado.</text:p>
          </table:table-cell>
          <table:table-cell table:number-columns-repeated="1014"/>
        </table:table-row>
        <table:table-row table:style-name="ro13">
          <table:table-cell table:style-name="ce18" table:formula="of:=[.A1643]+1" office:value-type="date" office:date-value="2026-06-07" calcext:value-type="date">
            <text:p>0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unção e da Graça dO nosso Senhor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44]+1" office:value-type="date" office:date-value="2026-06-08" calcext:value-type="date">
            <text:p>0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45]+1" office:value-type="date" office:date-value="2026-06-09" calcext:value-type="date">
            <text:p>0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a entrega que estava agarrada no trabalho e já peguei outro Bug pra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 dei um descanso.</text:p>
          </table:table-cell>
          <table:table-cell table:number-columns-repeated="1014"/>
        </table:table-row>
        <table:table-row table:style-name="ro2">
          <table:table-cell table:style-name="ce18" table:formula="of:=[.A1646]+1" office:value-type="date" office:date-value="2026-06-10" calcext:value-type="date">
            <text:p>1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47]+1" office:value-type="date" office:date-value="2026-06-11" calcext:value-type="date">
            <text:p>1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identificar muitas oportunidades e colaborar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8]+1" office:value-type="date" office:date-value="2026-06-12" calcext:value-type="date">
            <text:p>1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resolver muitas coisas e sigo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649]+1" office:value-type="date" office:date-value="2026-06-13" calcext:value-type="date">
            <text:p>1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com muita alegria e deliciosos momentos de comunhão em família e com irmã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0]+1" office:value-type="date" office:date-value="2026-06-14" calcext:value-type="date">
            <text:p>1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651]+1" office:value-type="date" office:date-value="2026-06-15" calcext:value-type="date">
            <text:p>1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52]+1" office:value-type="date" office:date-value="2026-06-16" calcext:value-type="date">
            <text:p>1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53]+1" office:value-type="date" office:date-value="2026-06-17" calcext:value-type="date">
            <text:p>1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sisti ao culto “Sobre A Mesa” e depois ministrei louvores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4]+1" office:value-type="date" office:date-value="2026-06-18" calcext:value-type="date">
            <text:p>1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o nosso querido irmão, amigo e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5]+1" office:value-type="date" office:date-value="2026-06-19" calcext:value-type="date">
            <text:p>1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olhando pra já começar minha pós-graduação Tech.</text:p>
          </table:table-cell>
          <table:table-cell table:number-columns-repeated="1014"/>
        </table:table-row>
        <table:table-row table:style-name="ro10">
          <table:table-cell table:style-name="ce18" table:formula="of:=[.A1656]+1" office:value-type="date" office:date-value="2026-06-20" calcext:value-type="date">
            <text:p>2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muita alegria. Aniversários do nosso irmãozão Elielson e do paizinho dele, comemoração com costelada ao fogo de chão, além do Café de homens com Cristo, onde ministrei e fui ministrado por muitas palavras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7]+1" office:value-type="date" office:date-value="2026-06-21" calcext:value-type="date">
            <text:p>2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58]+1" office:value-type="date" office:date-value="2026-06-22" calcext:value-type="date">
            <text:p>2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as entregas, um 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59]+1" office:value-type="date" office:date-value="2026-06-23" calcext:value-type="date">
            <text:p>2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danças lindas de minha filha na festinha caipira da escola e estar em família e irmãos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60]+1" office:value-type="date" office:date-value="2026-06-24" calcext:value-type="date">
            <text:p>2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ipoca.</text:p>
          </table:table-cell>
          <table:table-cell table:number-columns-repeated="1014"/>
        </table:table-row>
        <table:table-row table:style-name="ro2">
          <table:table-cell table:style-name="ce18" table:formula="of:=[.A1661]+1" office:value-type="date" office:date-value="2026-06-25" calcext:value-type="date">
            <text:p>2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662]+1" office:value-type="date" office:date-value="2026-06-26" calcext:value-type="date">
            <text:p>2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663]+1" office:value-type="date" office:date-value="2026-06-27" calcext:value-type="date">
            <text:p>27/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Correria, trabalhos da faculdade me fazendo dormir mal e pouquíssi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64]+1" office:value-type="date" office:date-value="2026-06-28" calcext:value-type="date">
            <text:p>28/06/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niversário de 72 anos de minha amada Mãe nos proporcionando muita alegria. Porém, os trabalhos da faculdade muito pesados me causando medo de não conseguir entregar e ainda ser reprovado nas disciplin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65]+1" office:value-type="date" office:date-value="2026-06-29" calcext:value-type="date">
            <text:p>29/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Passei o dia todo mal, apurado pra conseguir concluir os trabalhos da faculdade, entreguei nos últimos minutos com qualidade bem a quem do que eu gostari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666]+1" office:value-type="date" office:date-value="2026-06-30" calcext:value-type="date">
            <text:p>3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13">
          <table:table-cell table:style-name="ce18" table:formula="of:=[.A1667]+1" office:value-type="date" office:date-value="2026-07-01" calcext:value-type="date">
            <text:p>01/07/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68]+1" office:value-type="date" office:date-value="2026-07-02" calcext:value-type="date">
            <text:p>02/07/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sanduíche assado.</text:p>
          </table:table-cell>
          <table:table-cell table:number-columns-repeated="1014"/>
        </table:table-row>
        <table:table-row table:style-name="ro3" table:number-rows-repeated="1046906">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7-02">00/00/0000</text:date>, <text:time style:data-style-name="N2" text:time-value="21:35:47.89572970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7-02T21:36:33.971067184</dc:date>
    <meta:editing-duration>P1DT18H4M42S</meta:editing-duration>
    <meta:editing-cycles>1662</meta:editing-cycles>
    <meta:document-statistic meta:table-count="1" meta:cell-count="10061" meta:object-count="0"/>
  </office:meta>
</office:document-meta>
</file>