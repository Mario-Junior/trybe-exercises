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637" calcext:value-type="float">
            <text:p>1637</text:p>
          </table:table-cell>
          <table:table-cell table:style-name="ce7" table:formula="of:=COUNTIF([.B7:.B999998];&quot;X&quot;)" office:value-type="float" office:value="1438" calcext:value-type="float">
            <text:p>1438</text:p>
          </table:table-cell>
          <table:table-cell table:style-name="ce7" table:formula="of:=COUNTIF([.C7:.C999998];&quot;X&quot;)" office:value-type="float" office:value="27" calcext:value-type="float">
            <text:p>27</text:p>
          </table:table-cell>
          <table:table-cell table:style-name="ce7" table:formula="of:=COUNTIF([.D7:.D999998];&quot;X&quot;)" office:value-type="float" office:value="104" calcext:value-type="float">
            <text:p>104</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84" calcext:value-type="float">
            <text:p>184</text:p>
          </table:table-cell>
          <table:table-cell table:style-name="ce25" table:formula="of:=SUM([.B2:.F2])" office:value-type="float" office:value="1754" calcext:value-type="float">
            <text:p>1754</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40]+1" office:value-type="date" office:date-value="2026-02-24" calcext:value-type="date">
            <text:p>2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1]+1" office:value-type="date" office:date-value="2026-02-25" calcext:value-type="date">
            <text:p>2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ção de 15 anos de casa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21" table:formula="of:=[.A1542]+1" office:value-type="date" office:date-value="2026-02-26" calcext:value-type="date">
            <text:p>26/02/2026</text:p>
          </table:table-cell>
          <table:table-cell table:style-name="ce37" office:value-type="string" calcext:value-type="string">
            <text:p>X</text:p>
          </table:table-cell>
          <table:table-cell table:style-name="ce37" table:number-columns-repeated="4"/>
          <table:table-cell table:style-name="ce49" office:value-type="string" calcext:value-type="string">
            <text:p>Nossos 15 anos de casamento, abençoados pelo nosso Deu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Estudei bastante.</text:p>
          </table:table-cell>
          <table:table-cell table:number-columns-repeated="1014"/>
        </table:table-row>
        <table:table-row table:style-name="ro13">
          <table:table-cell table:style-name="ce18" table:formula="of:=[.A1543]+1" office:value-type="date" office:date-value="2026-02-27" calcext:value-type="date">
            <text:p>2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em revisão e sigo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21" table:formula="of:=[.A1544]+1" office:value-type="date" office:date-value="2026-02-28" calcext:value-type="date">
            <text:p>28/02/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Descansei ao longo do dia.</text:p>
          </table:table-cell>
          <table:table-cell table:number-columns-repeated="1014"/>
        </table:table-row>
        <table:table-row table:style-name="ro13">
          <table:table-cell table:style-name="ce21" table:formula="of:=[.A1545]+1" office:value-type="date" office:date-value="2026-03-01" calcext:value-type="date">
            <text:p>01/03/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40 anos de meu irmão de sangue, Pe. Marco Auréli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Fiz e comi churrasco.</text:p>
          </table:table-cell>
          <table:table-cell table:number-columns-repeated="1014"/>
        </table:table-row>
        <table:table-row table:style-name="ro5">
          <table:table-cell table:style-name="ce18" table:formula="of:=[.A1546]+1" office:value-type="date" office:date-value="2026-03-02" calcext:value-type="date">
            <text:p>02/03/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Recebi elogios da equipe. Porém, não recebi o valor (mais que justo e merecido) do bônus da empresa anter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47]+1" office:value-type="date" office:date-value="2026-03-03" calcext:value-type="date">
            <text:p>0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aprovada e mergeada, partindo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48]+1" office:value-type="date" office:date-value="2026-03-04" calcext:value-type="date">
            <text:p>0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ou bastante participativo e recebendo elogios da equip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9]+1" office:value-type="date" office:date-value="2026-03-05" calcext:value-type="date">
            <text:p>0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0]+1" office:value-type="date" office:date-value="2026-03-06" calcext:value-type="date">
            <text:p>0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1]+1" office:value-type="date" office:date-value="2026-03-07" calcext:value-type="date">
            <text:p>0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52]+1" office:value-type="date" office:date-value="2026-03-08" calcext:value-type="date">
            <text:p>0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53]+1" office:value-type="date" office:date-value="2026-03-09" calcext:value-type="date">
            <text:p>0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udança no escopo da demanda e eu estou conseguindo evolu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54]+1" office:value-type="date" office:date-value="2026-03-10" calcext:value-type="date">
            <text:p>10/03/2026</text:p>
          </table:table-cell>
          <table:table-cell table:style-name="ce28" table:number-columns-repeated="4"/>
          <table:table-cell table:style-name="ce28" office:value-type="string" calcext:value-type="string">
            <text:p>X</text:p>
          </table:table-cell>
          <table:table-cell table:style-name="ce42" office:value-type="string" calcext:value-type="string">
            <text:p>Demissão em massa na empresa e vários colegas de nossa Tribo e Time foram impact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555]+1" office:value-type="date" office:date-value="2026-03-11" calcext:value-type="date">
            <text:p>11/03/2026</text:p>
          </table:table-cell>
          <table:table-cell table:style-name="ce28" table:number-columns-repeated="4"/>
          <table:table-cell table:style-name="ce28" office:value-type="string" calcext:value-type="string">
            <text:p>X</text:p>
          </table:table-cell>
          <table:table-cell table:style-name="ce42" office:value-type="string" calcext:value-type="string">
            <text:p>Hoje ainda foi um dia estranho e triste, ausência dos colegas, time dissolvido e saber que serei migrado pra outro contexto totalmente diferent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6]+1" office:value-type="date" office:date-value="2026-03-12" calcext:value-type="date">
            <text:p>12/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7]+1" office:value-type="date" office:date-value="2026-03-13" calcext:value-type="date">
            <text:p>13/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8]+1" office:value-type="date" office:date-value="2026-03-14" calcext:value-type="date">
            <text:p>1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chorro-quente.</text:p>
          </table:table-cell>
          <table:table-cell table:number-columns-repeated="1014"/>
        </table:table-row>
        <table:table-row table:style-name="ro13">
          <table:table-cell table:style-name="ce18" table:formula="of:=[.A1559]+1" office:value-type="date" office:date-value="2026-03-15" calcext:value-type="date">
            <text:p>1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60]+1" office:value-type="date" office:date-value="2026-03-16" calcext:value-type="date">
            <text:p>1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novo time e, de verdade, obrigado Deus, pois, eu goste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61]+1" office:value-type="date" office:date-value="2026-03-17" calcext:value-type="date">
            <text:p>1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6">
          <table:table-cell table:style-name="ce18" table:formula="of:=[.A1562]+1" office:value-type="date" office:date-value="2026-03-18" calcext:value-type="date">
            <text:p>1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13">
          <table:table-cell table:style-name="ce18" table:formula="of:=[.A1563]+1" office:value-type="date" office:date-value="2026-03-19" calcext:value-type="date">
            <text:p>1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e o aniversário de meu pa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teatro de Páscoa da igreja.</text:p>
          </table:table-cell>
          <table:table-cell table:number-columns-repeated="1014"/>
        </table:table-row>
        <table:table-row table:style-name="ro13">
          <table:table-cell table:style-name="ce18" table:formula="of:=[.A1564]+1" office:value-type="date" office:date-value="2026-03-20" calcext:value-type="date">
            <text:p>2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65]+1" office:value-type="date" office:date-value="2026-03-21" calcext:value-type="date">
            <text:p>2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number-columns-repeated="1014"/>
        </table:table-row>
        <table:table-row table:style-name="ro6">
          <table:table-cell table:style-name="ce18" table:formula="of:=[.A1566]+1" office:value-type="date" office:date-value="2026-03-22" calcext:value-type="date">
            <text:p>22/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aravilhoso e abençoado com irmãos amigos queridos, churrasco e também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67]+1" office:value-type="date" office:date-value="2026-03-23" calcext:value-type="date">
            <text:p>2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568]+1" office:value-type="date" office:date-value="2026-03-24" calcext:value-type="date">
            <text:p>2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6">
          <table:table-cell table:style-name="ce18" table:formula="of:=[.A1569]+1" office:value-type="date" office:date-value="2026-03-25" calcext:value-type="date">
            <text:p>2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artilhando conhecimento, aprendendo mais e tendo reconheci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18" table:formula="of:=[.A1570]+1" office:value-type="date" office:date-value="2026-03-26" calcext:value-type="date">
            <text:p>2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i mais elogios pelo meu compartilh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1]+1" office:value-type="date" office:date-value="2026-03-27" calcext:value-type="date">
            <text:p>2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Fechei, com 100 pontos, mais duas provas bimestr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572]+1" office:value-type="date" office:date-value="2026-03-28" calcext:value-type="date">
            <text:p>2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73]+1" office:value-type="date" office:date-value="2026-03-29" calcext:value-type="date">
            <text:p>2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74]+1" office:value-type="date" office:date-value="2026-03-30" calcext:value-type="date">
            <text:p>3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5]+1" office:value-type="date" office:date-value="2026-03-31" calcext:value-type="date">
            <text:p>3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9">
          <table:table-cell table:style-name="ce18" table:formula="of:=[.A1576]+1" office:value-type="date" office:date-value="2026-04-01" calcext:value-type="date">
            <text:p>0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uma máquina de entregas potencializado pelas IA, usando GH Copilot e Claude Code ao mesmo tempo [e não, não é mentira, mesmo hoje sendo 1º de Abril – huahuahu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77]+1" office:value-type="date" office:date-value="2026-04-02" calcext:value-type="date">
            <text:p>0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o teatro pra intervenção de Páscoa na Igreja, tá ficando bênção pu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5">
          <table:table-cell table:style-name="ce18" table:formula="of:=[.A1578]+1" office:value-type="date" office:date-value="2026-04-03" calcext:value-type="date">
            <text:p>0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a sexta-feira Santa, dia em família, abençoado e tranquilo. E ainda cozinhei sardinhas (ficaram delicios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bacalhoada mais maravilhosa feita por minha mãe.</text:p>
          </table:table-cell>
          <table:table-cell table:number-columns-repeated="1014"/>
        </table:table-row>
        <table:table-row table:style-name="ro6">
          <table:table-cell table:style-name="ce18" table:formula="of:=[.A1579]+1" office:value-type="date" office:date-value="2026-04-04" calcext:value-type="date">
            <text:p>04/04/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O sábado… Em família, ensaio, e a espera pelo domingo. Onde Ele Viv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8">
          <table:table-cell table:style-name="ce18" table:formula="of:=[.A1580]+1" office:value-type="date" office:date-value="2026-04-05" calcext:value-type="date">
            <text:p>0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omingo de Páscoa, Ele Ressuscitou, Ele Vive!! E, nossa intervenção Pascal com Teatro e Dança foi bênção, abençoada e abençoad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um churras de Páscoa.</text:p>
          </table:table-cell>
          <table:table-cell table:number-columns-repeated="1014"/>
        </table:table-row>
        <table:table-row table:style-name="ro6">
          <table:table-cell table:style-name="ce18" table:formula="of:=[.A1581]+1" office:value-type="date" office:date-value="2026-04-06" calcext:value-type="date">
            <text:p>0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mos em equipe resolver muita coisa e subir a aplicação em todos os ambi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82]+1" office:value-type="date" office:date-value="2026-04-07" calcext:value-type="date">
            <text:p>0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aprendendo muito e evoluindo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583]+1" office:value-type="date" office:date-value="2026-04-08" calcext:value-type="date">
            <text:p>0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84]+1" office:value-type="date" office:date-value="2026-04-09" calcext:value-type="date">
            <text:p>0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ças ao Senhor, nosso Deus, estou, aos poucos, reencontrando o propósito em cada detalhe.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585]+1" office:value-type="date" office:date-value="2026-04-10" calcext:value-type="date">
            <text:p>1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ndo bem e à todo vap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prova bimestral.</text:p>
          </table:table-cell>
          <table:table-cell table:number-columns-repeated="1014"/>
        </table:table-row>
        <table:table-row table:style-name="ro6">
          <table:table-cell table:style-name="ce18" table:formula="of:=[.A1586]+1" office:value-type="date" office:date-value="2026-04-11" calcext:value-type="date">
            <text:p>1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 e noite com irmãos amigos am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echei mais duas APOL.</text:p>
          </table:table-cell>
          <table:table-cell table:number-columns-repeated="1014"/>
        </table:table-row>
        <table:table-row table:style-name="ro5">
          <table:table-cell table:style-name="ce18" table:formula="of:=[.A1587]+1" office:value-type="date" office:date-value="2026-04-12" calcext:value-type="date">
            <text:p>1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eus eu tenho tantas Bênçãos, posso em minha vida enxergar, quanto mais vejo os detalhes, Sua Bondade posso encont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88]+1" office:value-type="date" office:date-value="2026-04-13" calcext:value-type="date">
            <text:p>1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Quase concluindo toda 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89]+1" office:value-type="date" office:date-value="2026-04-14" calcext:value-type="date">
            <text:p>14/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í muito a entrega e ainda trabalhei durante a tarde de um coworking super legal, onde conheci pessoas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omecei o adaptativo de musculação.</text:p>
          </table:table-cell>
          <table:table-cell table:number-columns-repeated="1014"/>
        </table:table-row>
        <table:table-row table:style-name="ro2">
          <table:table-cell table:style-name="ce18" table:formula="of:=[.A1590]+1" office:value-type="date" office:date-value="2026-04-15" calcext:value-type="date">
            <text:p>1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2">
          <table:table-cell table:style-name="ce18" table:formula="of:=[.A1591]+1" office:value-type="date" office:date-value="2026-04-16" calcext:value-type="date">
            <text:p>1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ocado no treino.</text:p>
          </table:table-cell>
          <table:table-cell table:number-columns-repeated="1014"/>
        </table:table-row>
        <table:table-row table:style-name="ro13">
          <table:table-cell table:style-name="ce18" table:formula="of:=[.A1592]+1" office:value-type="date" office:date-value="2026-04-17" calcext:value-type="date">
            <text:p>1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1:1s e sendo muito bem recebido no tim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5">
          <table:table-cell table:style-name="ce18" table:formula="of:=[.A1593]+1" office:value-type="date" office:date-value="2026-04-18" calcext:value-type="date">
            <text:p>1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organização, muitos acontecimentos, preparativos para recebermos nosso irmão Nathanael e sua linda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muitas coisas de casa.</text:p>
          </table:table-cell>
          <table:table-cell table:number-columns-repeated="1014"/>
        </table:table-row>
        <table:table-row table:style-name="ro5">
          <table:table-cell table:style-name="ce18" table:formula="of:=[.A1594]+1" office:value-type="date" office:date-value="2026-04-19" calcext:value-type="date">
            <text:p>1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emos irmãos amigos queridos em casa e foram momentos de muita bênção e alegria. Grato Sou, Senh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4">
          <table:table-cell table:style-name="ce18" table:formula="of:=[.A1595]+1" office:value-type="date" office:date-value="2026-04-20" calcext:value-type="date">
            <text:p>20/04/2026</text:p>
          </table:table-cell>
          <table:table-cell table:number-columns-repeated="3" table:style-name="ce28" office:value-type="string" calcext:value-type="string">
            <text:p>X</text:p>
          </table:table-cell>
          <table:table-cell table:style-name="ce28" table:number-columns-repeated="2"/>
          <table:table-cell table:style-name="ce42" office:value-type="string" calcext:value-type="string">
            <text:p>Depois de um susto grande na madrugada, com um vazamento de água que inundou parte da nossa casa e, tudo indica que há algo de muito errado na nossa ligação de água, passei a noite em claro. E, Deus me fortaleceu, consegui resolver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96]+1" office:value-type="date" office:date-value="2026-04-21" calcext:value-type="date">
            <text:p>2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Hoje eu me superei na cozinha, alegrei toda a minha família e passamos um dia muito abençoado e maravilho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Yakisoba.</text:p>
          </table:table-cell>
          <table:table-cell table:number-columns-repeated="1014"/>
        </table:table-row>
        <table:table-row table:style-name="ro13">
          <table:table-cell table:style-name="ce18" table:formula="of:=[.A1597]+1" office:value-type="date" office:date-value="2026-04-22" calcext:value-type="date">
            <text:p>2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de bom trabalho e muita aleg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0">
          <table:table-cell table:style-name="ce18" table:formula="of:=[.A1598]+1" office:value-type="date" office:date-value="2026-04-23" calcext:value-type="date">
            <text:p>23/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ão foi um dia dos melhores, tô me sentindo meio mal, com dores estranhas, até me preocupei sobre uma possível dengue. Ao mesmo tempo, O Senhor me concedeu a bênção de assumir o solo de um louvor apaixonante pra ministrar nesse próximo doming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99]+1" office:value-type="date" office:date-value="2026-04-24" calcext:value-type="date">
            <text:p>24/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Sigo me sentindo meio mal, com dores estranhas e preocupado. Mas, O Senhor também tem provido Suas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andioca com churrasco.</text:p>
          </table:table-cell>
          <table:table-cell table:number-columns-repeated="1014"/>
        </table:table-row>
        <table:table-row table:style-name="ro6">
          <table:table-cell table:style-name="ce18" table:formula="of:=[.A1600]+1" office:value-type="date" office:date-value="2026-04-25" calcext:value-type="date">
            <text:p>2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e sinto melhor e tivemos um dia abençoado e maravilhoso em família, com muitas alegr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601]+1" office:value-type="date" office:date-value="2026-04-26" calcext:value-type="date">
            <text:p>2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bênçãos dO Senhor têm se multiplicado imensamente, reunião após reunião, culto após culto, Deus tem ministrado através de mim e me usado, como eu tenho p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02]+1" office:value-type="date" office:date-value="2026-04-27" calcext:value-type="date">
            <text:p>2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misericórdias dO Senhor, têm se renovado à cada manhã.</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03]+1" office:value-type="date" office:date-value="2026-04-28" calcext:value-type="date">
            <text:p>2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Voando alto no trabalho, recebi meu novo smartwatch, super conte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04]+1" office:value-type="date" office:date-value="2026-04-29" calcext:value-type="date">
            <text:p>2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9">
          <table:table-cell table:style-name="ce18" table:formula="of:=[.A1605]+1" office:value-type="date" office:date-value="2026-04-30" calcext:value-type="date">
            <text:p>3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us e entreguei uma ótima avaliação trimestral, com muitas conquistas, devidamente detalhadas e tive uma ótima conversa com o nosso ilustre líder de Produto, Pedro Menez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6">
          <table:table-cell table:style-name="ce18" table:formula="of:=[.A1606]+1" office:value-type="date" office:date-value="2026-05-01" calcext:value-type="date">
            <text:p>0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inho abençoado e maravilhoso em família, fiz muitas coisas e ainda segui a dieta.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07]+1" office:value-type="date" office:date-value="2026-05-02" calcext:value-type="date">
            <text:p>0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Alegria, dia abençoado e muito bom em família e Deus em 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608]+1" office:value-type="date" office:date-value="2026-05-03" calcext:value-type="date">
            <text:p>0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ricamente abençoado, onde passamos em comunhão em família e com nossos amados irmão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2">
          <table:table-cell table:style-name="ce18" table:formula="of:=[.A1609]+1" office:value-type="date" office:date-value="2026-05-04" calcext:value-type="date">
            <text:p>0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610]+1" office:value-type="date" office:date-value="2026-05-05" calcext:value-type="date">
            <text:p>0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resoluções, com a direção dO nosso Deus, indo na frente, abrindo os caminhos, nos conduzind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11]+1" office:value-type="date" office:date-value="2026-05-06" calcext:value-type="date">
            <text:p>0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Cada dia melhor, com a graça de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7">
          <table:table-cell table:style-name="ce18" table:formula="of:=[.A1612]+1" office:value-type="date" office:date-value="2026-05-07" calcext:value-type="date">
            <text:p>07/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ntem no final da noite, tomei um grande susto, um confronto com uma pessoa maluca, que me ameaçou de morte, dentro da academia, por motivo totalmente fútil. Mas, Deus sempre É maior e nos deu o livrament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13]+1" office:value-type="date" office:date-value="2026-05-08" calcext:value-type="date">
            <text:p>08/05/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to sou por tudo o que O Senhor tem feito por nós e através de nó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6">
          <table:table-cell table:style-name="ce18" table:formula="of:=[.A1614]+1" office:value-type="date" office:date-value="2026-05-09" calcext:value-type="date">
            <text:p>09/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cheio de bênçãos, alegrias e muitos feitos e preparativos para nosso almoço para o Dia das Mã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hurros.</text:p>
          </table:table-cell>
          <table:table-cell table:number-columns-repeated="1014"/>
        </table:table-row>
        <table:table-row table:style-name="ro14">
          <table:table-cell table:style-name="ce18" table:formula="of:=[.A1615]+1" office:value-type="date" office:date-value="2026-05-10" calcext:value-type="date">
            <text:p>1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Que dia repleto de bênçãos e alegrias, conseguimos reunir meus pais e irmão e uma de minhas tias, fiz um maravilhoso almoço em comemoração ao Dia das Mães, passamos o dia em família e, a noite, ainda fui abençoado e abençoei várias vidas, sendo usado poderosamente no louv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16]+1" office:value-type="date" office:date-value="2026-05-11" calcext:value-type="date">
            <text:p>1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ões e aprendizados consta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617]+1" office:value-type="date" office:date-value="2026-05-12" calcext:value-type="date">
            <text:p>1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Preparativos para as comemorações de aniversário de 4 anos da nossa Congreg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8">
          <table:table-cell table:style-name="ce18" table:formula="of:=[.A1618]+1" office:value-type="date" office:date-value="2026-05-13" calcext:value-type="date">
            <text:p>1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1 das comemorações do aniversário de 4 anos da nossa Congregação. Foi nítido o derramar do Espírito Santo de Deus em meio ao nossos irmãs e irm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8">
          <table:table-cell table:style-name="ce18" table:formula="of:=[.A1619]+1" office:value-type="date" office:date-value="2026-05-14" calcext:value-type="date">
            <text:p>1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2 das comemorações do aniversário de 4 anos da nossa Congregação, bênçãos e mais bênçãos e o derramar do Espírito Santo mais um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8">
          <table:table-cell table:style-name="ce18" table:formula="of:=[.A1620]+1" office:value-type="date" office:date-value="2026-05-15" calcext:value-type="date">
            <text:p>1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3 das comemorações do aniversário de 4 anos da nossa Congregação, muitas bênçãos em nosso jantar de confraternização dos servas e servos ao noss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621]+1" office:value-type="date" office:date-value="2026-05-16" calcext:value-type="date">
            <text:p>1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22]+1" office:value-type="date" office:date-value="2026-05-17" calcext:value-type="date">
            <text:p>17/05/2026</text:p>
          </table:table-cell>
          <table:table-cell table:style-name="ce28" office:value-type="string" calcext:value-type="string">
            <text:p>X</text:p>
          </table:table-cell>
          <table:table-cell table:style-name="ce28" table:number-columns-repeated="4"/>
          <table:table-cell table:style-name="ce42" office:value-type="string" calcext:value-type="string">
            <text:p>Novo dia cheio de bênçãos e muito alegr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5">
          <table:table-cell table:style-name="ce18" table:formula="of:=[.A1623]+1" office:value-type="date" office:date-value="2026-05-18" calcext:value-type="date">
            <text:p>18/05/2026</text:p>
          </table:table-cell>
          <table:table-cell table:number-columns-repeated="2" table:style-name="ce28" office:value-type="string" calcext:value-type="string">
            <text:p>X</text:p>
          </table:table-cell>
          <table:table-cell table:style-name="ce28" table:number-columns-repeated="3"/>
          <table:table-cell table:style-name="ce42" office:value-type="string" calcext:value-type="string">
            <text:p>Dia com algumas bênçãos, porém, meio agarrado, devido crise de rinite/sinusite e internet da Algar bicha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uita oração abençoadora no PG.</text:p>
          </table:table-cell>
          <table:table-cell table:number-columns-repeated="1014"/>
        </table:table-row>
        <table:table-row table:style-name="ro6">
          <table:table-cell table:style-name="ce18" table:formula="of:=[.A1624]+1" office:value-type="date" office:date-value="2026-05-19" calcext:value-type="date">
            <text:p>19/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recuperar um pouco do trabalho agarrado do dia anterior. E, dia de cozinhar comida delici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arne louca.</text:p>
          </table:table-cell>
          <table:table-cell table:number-columns-repeated="1014"/>
        </table:table-row>
        <table:table-row table:style-name="ro2">
          <table:table-cell table:style-name="ce18" table:formula="of:=[.A1625]+1" office:value-type="date" office:date-value="2026-05-20" calcext:value-type="date">
            <text:p>2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26]+1" office:value-type="date" office:date-value="2026-05-21" calcext:value-type="date">
            <text:p>2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Bons resultado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27]+1" office:value-type="date" office:date-value="2026-05-22" calcext:value-type="date">
            <text:p>2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um pouco agarrado e corrido, porém, repleto de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628]+1" office:value-type="date" office:date-value="2026-05-23" calcext:value-type="date">
            <text:p>2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6">
          <table:table-cell table:style-name="ce18" table:formula="of:=[.A1629]+1" office:value-type="date" office:date-value="2026-05-24" calcext:value-type="date">
            <text:p>2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usado poderosamente na igreja para o louvor e ministração dA Palavra de Deus.</text:p>
          </table:table-cell>
          <table:table-cell table:number-columns-repeated="1014"/>
        </table:table-row>
        <table:table-row table:style-name="ro13">
          <table:table-cell table:style-name="ce18" table:formula="of:=[.A1630]+1" office:value-type="date" office:date-value="2026-05-25" calcext:value-type="date">
            <text:p>2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muito no trabalho e na academ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31]+1" office:value-type="date" office:date-value="2026-05-26" calcext:value-type="date">
            <text:p>2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Cada dia desbloqueando mais habil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6">
          <table:table-cell table:style-name="ce18" table:formula="of:=[.A1632]+1" office:value-type="date" office:date-value="2026-05-27" calcext:value-type="date">
            <text:p>27/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lguns sustos por dois incidentes e, O Senhor nos sustém e cuida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5">
          <table:table-cell table:style-name="ce18" table:formula="of:=[.A1633]+1" office:value-type="date" office:date-value="2026-05-28" calcext:value-type="date">
            <text:p>28/05/2026</text:p>
          </table:table-cell>
          <table:table-cell table:style-name="ce28" office:value-type="string" calcext:value-type="string">
            <text:p>X</text:p>
          </table:table-cell>
          <table:table-cell table:style-name="ce28" table:number-columns-repeated="4"/>
          <table:table-cell table:style-name="ce42" office:value-type="string" calcext:value-type="string">
            <text:p>Tive a honra de conhecer pessoalmente o ilustre Jonatas Maximiano, da Stone. E, recuperando, com a graça de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5">
          <table:table-cell table:style-name="ce18" table:formula="of:=[.A1634]+1" office:value-type="date" office:date-value="2026-05-29" calcext:value-type="date">
            <text:p>29/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legre, pois o procedimento de minha esposa correu bem, porém, com medo, pois, não foi possível extrair tudo e ela terá que volt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635]+1" office:value-type="date" office:date-value="2026-05-30" calcext:value-type="date">
            <text:p>3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uito abençoado, entre irmãos 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ministrei palavras de louvor e adoração.</text:p>
          </table:table-cell>
          <table:table-cell table:number-columns-repeated="1014"/>
        </table:table-row>
        <table:table-row table:style-name="ro13">
          <table:table-cell table:style-name="ce18" table:formula="of:=[.A1636]+1" office:value-type="date" office:date-value="2026-05-31" calcext:value-type="date">
            <text:p>3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uito abençoado, entre irmãos 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pamonha.</text:p>
          </table:table-cell>
          <table:table-cell table:number-columns-repeated="1014"/>
        </table:table-row>
        <table:table-row table:style-name="ro13">
          <table:table-cell table:style-name="ce18" table:formula="of:=[.A1637]+1" office:value-type="date" office:date-value="2026-06-01" calcext:value-type="date">
            <text:p>01/06/2026</text:p>
          </table:table-cell>
          <table:table-cell table:style-name="ce28" office:value-type="string" calcext:value-type="string">
            <text:p>X</text:p>
          </table:table-cell>
          <table:table-cell table:style-name="ce28" table:number-columns-repeated="4"/>
          <table:table-cell table:style-name="ce42" office:value-type="string" calcext:value-type="string">
            <text:p>Rompendo em Fé na situação da questão de saúde de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muito abençoada Palavra sobre Perdão no PG.</text:p>
          </table:table-cell>
          <table:table-cell table:number-columns-repeated="1014"/>
        </table:table-row>
        <table:table-row table:style-name="ro13">
          <table:table-cell table:style-name="ce18" table:formula="of:=[.A1638]+1" office:value-type="date" office:date-value="2026-06-02" calcext:value-type="date">
            <text:p>02/06/2026</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um pouco agarrado e corrido, porém, repleto de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639]+1" office:value-type="date" office:date-value="2026-06-03" calcext:value-type="date">
            <text:p>03/06/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Tô triste com a situação de minha esposa e (bem) cansado, porém, Cristo tem sido sempre minha fortalez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640]+1" office:value-type="date" office:date-value="2026-06-04" calcext:value-type="date">
            <text:p>04/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descan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41]+1" office:value-type="date" office:date-value="2026-06-05" calcext:value-type="date">
            <text:p>05/06/2026</text:p>
          </table:table-cell>
          <table:table-cell table:style-name="ce28" office:value-type="string" calcext:value-type="string">
            <text:p>X</text:p>
          </table:table-cell>
          <table:table-cell table:style-name="ce28" table:number-columns-repeated="4"/>
          <table:table-cell table:style-name="ce42" office:value-type="string" calcext:value-type="string">
            <text:p>Ponte de feriad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42]+1" office:value-type="date" office:date-value="2026-06-06" calcext:value-type="date">
            <text:p>06/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Um dia de autocuidado.</text:p>
          </table:table-cell>
          <table:table-cell table:number-columns-repeated="1014"/>
        </table:table-row>
        <table:table-row table:style-name="ro3" table:number-rows-repeated="1046932">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6-06">00/00/0000</text:date>, <text:time style:data-style-name="N2" text:time-value="21:47:14.31721690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6-06T21:48:41.385145646</dc:date>
    <meta:editing-duration>P1DT17H37M27S</meta:editing-duration>
    <meta:editing-cycles>1639</meta:editing-cycles>
    <meta:document-statistic meta:table-count="1" meta:cell-count="9902" meta:object-count="0"/>
  </office:meta>
</office:document-meta>
</file>