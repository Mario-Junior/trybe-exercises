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67" calcext:value-type="float">
            <text:p>1667</text:p>
          </table:table-cell>
          <table:table-cell table:style-name="ce7" table:formula="of:=COUNTIF([.B7:.B999998];&quot;X&quot;)" office:value-type="float" office:value="1466" calcext:value-type="float">
            <text:p>1466</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8" calcext:value-type="float">
            <text:p>10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6" calcext:value-type="float">
            <text:p>186</text:p>
          </table:table-cell>
          <table:table-cell table:style-name="ce25" table:formula="of:=SUM([.B2:.F2])" office:value-type="float" office:value="1788" calcext:value-type="float">
            <text:p>178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13">
          <table:table-cell table:style-name="ce18" table:formula="of:=[.A1670]+1" office:value-type="date" office:date-value="2026-07-04" calcext:value-type="date">
            <text:p>04/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671]+1" office:value-type="date" office:date-value="2026-07-05" calcext:value-type="date">
            <text:p>0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abençoado e maravilhoso em família e com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2]+1" office:value-type="date" office:date-value="2026-07-06" calcext:value-type="date">
            <text:p>0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o bom, dia repleto de produtiv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3" table:number-rows-repeated="104690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7:43:55.9757813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06T17:44:57.463291327</dc:date>
    <meta:editing-duration>P1DT18H8M47S</meta:editing-duration>
    <meta:editing-cycles>1665</meta:editing-cycles>
    <meta:document-statistic meta:table-count="1" meta:cell-count="10086" meta:object-count="0"/>
  </office:meta>
</office:document-meta>
</file>