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73" calcext:value-type="float">
            <text:p>1673</text:p>
          </table:table-cell>
          <table:table-cell table:style-name="ce7" table:formula="of:=COUNTIF([.B7:.B999998];&quot;X&quot;)" office:value-type="float" office:value="1472" calcext:value-type="float">
            <text:p>1472</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8" calcext:value-type="float">
            <text:p>10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6" calcext:value-type="float">
            <text:p>186</text:p>
          </table:table-cell>
          <table:table-cell table:style-name="ce25" table:formula="of:=SUM([.B2:.F2])" office:value-type="float" office:value="1794" calcext:value-type="float">
            <text:p>17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75]+1" office:value-type="date" office:date-value="2026-07-09" calcext:value-type="date">
            <text:p>09/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6]+1" office:value-type="date" office:date-value="2026-07-10" calcext:value-type="date">
            <text:p>10/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7]+1" office:value-type="date" office:date-value="2026-07-11" calcext:value-type="date">
            <text:p>1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8]+1" office:value-type="date" office:date-value="2026-07-12" calcext:value-type="date">
            <text:p>1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89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12">00/00/0000</text:date>, <text:time style:data-style-name="N2" text:time-value="19:08:14.7255936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12T19:08:45.934233952</dc:date>
    <meta:editing-duration>P1DT18H12M19S</meta:editing-duration>
    <meta:editing-cycles>1670</meta:editing-cycles>
    <meta:document-statistic meta:table-count="1" meta:cell-count="10122" meta:object-count="0"/>
  </office:meta>
</office:document-meta>
</file>