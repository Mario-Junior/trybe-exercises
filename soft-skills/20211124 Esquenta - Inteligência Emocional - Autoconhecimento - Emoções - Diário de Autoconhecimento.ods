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84" calcext:value-type="float">
            <text:p>1684</text:p>
          </table:table-cell>
          <table:table-cell table:style-name="ce7" table:formula="of:=COUNTIF([.B7:.B999998];&quot;X&quot;)" office:value-type="float" office:value="1479" calcext:value-type="float">
            <text:p>1479</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10" calcext:value-type="float">
            <text:p>11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90" calcext:value-type="float">
            <text:p>190</text:p>
          </table:table-cell>
          <table:table-cell table:style-name="ce25" table:formula="of:=SUM([.B2:.F2])" office:value-type="float" office:value="1807" calcext:value-type="float">
            <text:p>180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79]+1" office:value-type="date" office:date-value="2026-07-13" calcext:value-type="date">
            <text:p>13/07/2026</text:p>
          </table:table-cell>
          <table:table-cell table:style-name="ce28" table:number-columns-repeated="4"/>
          <table:table-cell table:style-name="ce28" office:value-type="string" calcext:value-type="string">
            <text:p>X</text:p>
          </table:table-cell>
          <table:table-cell table:style-name="ce42" office:value-type="string" calcext:value-type="string">
            <text:p>Ah Deus, tava tudo indo tão abençoadamente bem mas, porque Senhor, do nada, essa tristeza, essa sensação de fraquez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80]+1" office:value-type="date" office:date-value="2026-07-14" calcext:value-type="date">
            <text:p>14/07/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voluindo as coisas do trabalho porém, com a mente e o corpo sentindo-me frac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81]+1" office:value-type="date" office:date-value="2026-07-15" calcext:value-type="date">
            <text:p>1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2]+1" office:value-type="date" office:date-value="2026-07-16" calcext:value-type="date">
            <text:p>1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3]+1" office:value-type="date" office:date-value="2026-07-17" calcext:value-type="date">
            <text:p>17/07/2026</text:p>
          </table:table-cell>
          <table:table-cell table:style-name="ce28" table:number-columns-repeated="4"/>
          <table:table-cell table:style-name="ce28" office:value-type="string" calcext:value-type="string">
            <text:p>X</text:p>
          </table:table-cell>
          <table:table-cell table:style-name="ce42" office:value-type="string" calcext:value-type="string">
            <text:p>Dia bastante agarr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4]+1" office:value-type="date" office:date-value="2026-07-18" calcext:value-type="date">
            <text:p>1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7">
          <table:table-cell table:style-name="ce18" table:formula="of:=[.A1685]+1" office:value-type="date" office:date-value="2026-07-19" calcext:value-type="date">
            <text:p>19/07/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Sim, duas emoções distintas, um bom dia em família porém, com aquela tristeza de ter tantas coisas por fazer, não conseguir evoluir e estar me sentindo perdido. Deus, eu tava tão bem até esses dias, porque i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686]+1" office:value-type="date" office:date-value="2026-07-20" calcext:value-type="date">
            <text:p>20/07/2026</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Pai, por favor, me conduz, eu te imploro, me faz superar este momento e recuperar a ord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87]+1" office:value-type="date" office:date-value="2026-07-21" calcext:value-type="date">
            <text:p>2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s teus milagr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88]+1" office:value-type="date" office:date-value="2026-07-22" calcext:value-type="date">
            <text:p>2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s teus milagr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89]+1" office:value-type="date" office:date-value="2026-07-23" calcext:value-type="date">
            <text:p>23/07/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s teus milagr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688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23">00/00/0000</text:date>, <text:time style:data-style-name="N2" text:time-value="18:28:51.8796861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23T18:29:06.221893012</dc:date>
    <meta:editing-duration>P1DT18H36M8S</meta:editing-duration>
    <meta:editing-cycles>1681</meta:editing-cycles>
    <meta:document-statistic meta:table-count="1" meta:cell-count="10190" meta:object-count="0"/>
  </office:meta>
</office:document-meta>
</file>