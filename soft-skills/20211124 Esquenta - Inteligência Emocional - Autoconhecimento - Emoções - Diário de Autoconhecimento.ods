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80" calcext:value-type="float">
            <text:p>1680</text:p>
          </table:table-cell>
          <table:table-cell table:style-name="ce7" table:formula="of:=COUNTIF([.B7:.B999998];&quot;X&quot;)" office:value-type="float" office:value="1476" calcext:value-type="float">
            <text:p>147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90" calcext:value-type="float">
            <text:p>190</text:p>
          </table:table-cell>
          <table:table-cell table:style-name="ce25" table:formula="of:=SUM([.B2:.F2])" office:value-type="float" office:value="1803" calcext:value-type="float">
            <text:p>18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7">
          <table:table-cell table:style-name="ce18" table:formula="of:=[.A1685]+1" office:value-type="date" office:date-value="2026-07-19" calcext:value-type="date">
            <text:p>19/07/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Sim, duas emoções distintas, um bom dia em família porém, com aquela tristeza de ter tantas coisas por fazer, não conseguir evoluir e estar me sentindo perdido. Deus, eu tava tão bem até esses dias, porque i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88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9">00/00/0000</text:date>, <text:time style:data-style-name="N2" text:time-value="19:55:39.6668489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9T19:57:09.279440046</dc:date>
    <meta:editing-duration>P1DT18H32M35S</meta:editing-duration>
    <meta:editing-cycles>1677</meta:editing-cycles>
    <meta:document-statistic meta:table-count="1" meta:cell-count="10166" meta:object-count="0"/>
  </office:meta>
</office:document-meta>
</file>