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64" calcext:value-type="float">
            <text:p>1664</text:p>
          </table:table-cell>
          <table:table-cell table:style-name="ce7" table:formula="of:=COUNTIF([.B7:.B999998];&quot;X&quot;)" office:value-type="float" office:value="1463" calcext:value-type="float">
            <text:p>1463</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8" calcext:value-type="float">
            <text:p>10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6" calcext:value-type="float">
            <text:p>186</text:p>
          </table:table-cell>
          <table:table-cell table:style-name="ce25" table:formula="of:=SUM([.B2:.F2])" office:value-type="float" office:value="1785" calcext:value-type="float">
            <text:p>17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3" table:number-rows-repeated="104690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03">00/00/0000</text:date>, <text:time style:data-style-name="N2" text:time-value="21:24:02.1246105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03T21:24:57.436329058</dc:date>
    <meta:editing-duration>P1DT18H5M37S</meta:editing-duration>
    <meta:editing-cycles>1663</meta:editing-cycles>
    <meta:document-statistic meta:table-count="1" meta:cell-count="10068" meta:object-count="0"/>
  </office:meta>
</office:document-meta>
</file>