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17" calcext:value-type="float">
            <text:p>1617</text:p>
          </table:table-cell>
          <table:table-cell table:style-name="ce7" table:formula="of:=COUNTIF([.B7:.B999998];&quot;X&quot;)" office:value-type="float" office:value="1418" calcext:value-type="float">
            <text:p>1418</text:p>
          </table:table-cell>
          <table:table-cell table:style-name="ce7" table:formula="of:=COUNTIF([.C7:.C999998];&quot;X&quot;)" office:value-type="float" office:value="26" calcext:value-type="float">
            <text:p>26</text:p>
          </table:table-cell>
          <table:table-cell table:style-name="ce7" table:formula="of:=COUNTIF([.D7:.D999998];&quot;X&quot;)" office:value-type="float" office:value="102" calcext:value-type="float">
            <text:p>10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29" calcext:value-type="float">
            <text:p>172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3" table:number-rows-repeated="104695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17">00/00/0000</text:date>, <text:time style:data-style-name="N2" text:time-value="22:19:09.76134237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17T22:19:58.422717214</dc:date>
    <meta:editing-duration>P1DT17H8M2S</meta:editing-duration>
    <meta:editing-cycles>1615</meta:editing-cycles>
    <meta:document-statistic meta:table-count="1" meta:cell-count="9777" meta:object-count="0"/>
  </office:meta>
</office:document-meta>
</file>