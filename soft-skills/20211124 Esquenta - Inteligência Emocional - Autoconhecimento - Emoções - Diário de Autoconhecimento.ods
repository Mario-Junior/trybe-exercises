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1" calcext:value-type="float">
            <text:p>1621</text:p>
          </table:table-cell>
          <table:table-cell table:style-name="ce7" table:formula="of:=COUNTIF([.B7:.B999998];&quot;X&quot;)" office:value-type="float" office:value="1422" calcext:value-type="float">
            <text:p>142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4" calcext:value-type="float">
            <text:p>17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4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23:08:29.1076052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1T23:09:43.247414449</dc:date>
    <meta:editing-duration>P1DT17H12M39S</meta:editing-duration>
    <meta:editing-cycles>1619</meta:editing-cycles>
    <meta:document-statistic meta:table-count="1" meta:cell-count="9802" meta:object-count="0"/>
  </office:meta>
</office:document-meta>
</file>