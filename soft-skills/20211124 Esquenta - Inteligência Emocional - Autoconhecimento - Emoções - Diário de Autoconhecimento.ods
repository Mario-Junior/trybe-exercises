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42" calcext:value-type="float">
            <text:p>1642</text:p>
          </table:table-cell>
          <table:table-cell table:style-name="ce7" table:formula="of:=COUNTIF([.B7:.B999998];&quot;X&quot;)" office:value-type="float" office:value="1443" calcext:value-type="float">
            <text:p>1443</text:p>
          </table:table-cell>
          <table:table-cell table:style-name="ce7" table:formula="of:=COUNTIF([.C7:.C999998];&quot;X&quot;)" office:value-type="float" office:value="27" calcext:value-type="float">
            <text:p>27</text:p>
          </table:table-cell>
          <table:table-cell table:style-name="ce7" table:formula="of:=COUNTIF([.D7:.D999998];&quot;X&quot;)" office:value-type="float" office:value="104" calcext:value-type="float">
            <text:p>10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4" calcext:value-type="float">
            <text:p>184</text:p>
          </table:table-cell>
          <table:table-cell table:style-name="ce25" table:formula="of:=SUM([.B2:.F2])" office:value-type="float" office:value="1759" calcext:value-type="float">
            <text:p>175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8">
          <table:table-cell table:style-name="ce18" table:formula="of:=[.A1618]+1" office:value-type="date" office:date-value="2026-05-13" calcext:value-type="date">
            <text:p>1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1 das comemorações do aniversário de 4 anos da nossa Congregação. Foi nítido o derramar do Espírito Santo de Deus em meio ao nossos irmãs e irm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19]+1" office:value-type="date" office:date-value="2026-05-14" calcext:value-type="date">
            <text:p>1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2 das comemorações do aniversário de 4 anos da nossa Congregação, bênçãos e mais bênçãos e o derramar do Espírito Santo mais um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8">
          <table:table-cell table:style-name="ce18" table:formula="of:=[.A1620]+1" office:value-type="date" office:date-value="2026-05-15" calcext:value-type="date">
            <text:p>1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3 das comemorações do aniversário de 4 anos da nossa Congregação, muitas bênçãos em nosso jantar de confraternização dos servas e servos ao noss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21]+1" office:value-type="date" office:date-value="2026-05-16" calcext:value-type="date">
            <text:p>1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2]+1" office:value-type="date" office:date-value="2026-05-17" calcext:value-type="date">
            <text:p>17/05/2026</text:p>
          </table:table-cell>
          <table:table-cell table:style-name="ce28" office:value-type="string" calcext:value-type="string">
            <text:p>X</text:p>
          </table:table-cell>
          <table:table-cell table:style-name="ce28" table:number-columns-repeated="4"/>
          <table:table-cell table:style-name="ce42" office:value-type="string" calcext:value-type="string">
            <text:p>Novo dia cheio de bênçãos e muito alegr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5">
          <table:table-cell table:style-name="ce18" table:formula="of:=[.A1623]+1" office:value-type="date" office:date-value="2026-05-18" calcext:value-type="date">
            <text:p>18/05/2026</text:p>
          </table:table-cell>
          <table:table-cell table:number-columns-repeated="2" table:style-name="ce28" office:value-type="string" calcext:value-type="string">
            <text:p>X</text:p>
          </table:table-cell>
          <table:table-cell table:style-name="ce28" table:number-columns-repeated="3"/>
          <table:table-cell table:style-name="ce42" office:value-type="string" calcext:value-type="string">
            <text:p>Dia com algumas bênçãos, porém, meio agarrado, devido crise de rinite/sinusite e internet da Algar bicha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uita oração abençoadora no PG.</text:p>
          </table:table-cell>
          <table:table-cell table:number-columns-repeated="1014"/>
        </table:table-row>
        <table:table-row table:style-name="ro6">
          <table:table-cell table:style-name="ce18" table:formula="of:=[.A1624]+1" office:value-type="date" office:date-value="2026-05-19" calcext:value-type="date">
            <text:p>1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cuperar um pouco do trabalho agarrado do dia anterior. E, dia de cozinhar comida delici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arne louca.</text:p>
          </table:table-cell>
          <table:table-cell table:number-columns-repeated="1014"/>
        </table:table-row>
        <table:table-row table:style-name="ro2">
          <table:table-cell table:style-name="ce18" table:formula="of:=[.A1625]+1" office:value-type="date" office:date-value="2026-05-20" calcext:value-type="date">
            <text:p>2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26]+1" office:value-type="date" office:date-value="2026-05-21" calcext:value-type="date">
            <text:p>2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ns resultado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7]+1" office:value-type="date" office:date-value="2026-05-22" calcext:value-type="date">
            <text:p>2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28]+1" office:value-type="date" office:date-value="2026-05-23" calcext:value-type="date">
            <text:p>2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6">
          <table:table-cell table:style-name="ce18" table:formula="of:=[.A1629]+1" office:value-type="date" office:date-value="2026-05-24" calcext:value-type="date">
            <text:p>2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usado poderosamente na igreja para o louvor e ministração dA Palavra de Deus.</text:p>
          </table:table-cell>
          <table:table-cell table:number-columns-repeated="1014"/>
        </table:table-row>
        <table:table-row table:style-name="ro13">
          <table:table-cell table:style-name="ce18" table:formula="of:=[.A1630]+1" office:value-type="date" office:date-value="2026-05-25" calcext:value-type="date">
            <text:p>2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31]+1" office:value-type="date" office:date-value="2026-05-26" calcext:value-type="date">
            <text:p>2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desbloqueando mais habil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32]+1" office:value-type="date" office:date-value="2026-05-27" calcext:value-type="date">
            <text:p>2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lguns sustos por dois incidentes e, O Senhor nos sustém e cuida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5">
          <table:table-cell table:style-name="ce18" table:formula="of:=[.A1633]+1" office:value-type="date" office:date-value="2026-05-28" calcext:value-type="date">
            <text:p>2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Tive a honra de conhecer pessoalmente o ilustre Jonatas Maximiano, da Stone. E, recuperando,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5">
          <table:table-cell table:style-name="ce18" table:formula="of:=[.A1634]+1" office:value-type="date" office:date-value="2026-05-29" calcext:value-type="date">
            <text:p>29/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e, pois o procedimento de minha esposa correu bem, porém, com medo, pois, não foi possível extrair tudo e ela terá que volt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35]+1" office:value-type="date" office:date-value="2026-05-30" calcext:value-type="date">
            <text:p>3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ministrei palavras de louvor e adoração.</text:p>
          </table:table-cell>
          <table:table-cell table:number-columns-repeated="1014"/>
        </table:table-row>
        <table:table-row table:style-name="ro13">
          <table:table-cell table:style-name="ce18" table:formula="of:=[.A1636]+1" office:value-type="date" office:date-value="2026-05-31" calcext:value-type="date">
            <text:p>3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pamonha.</text:p>
          </table:table-cell>
          <table:table-cell table:number-columns-repeated="1014"/>
        </table:table-row>
        <table:table-row table:style-name="ro13">
          <table:table-cell table:style-name="ce18" table:formula="of:=[.A1637]+1" office:value-type="date" office:date-value="2026-06-01" calcext:value-type="date">
            <text:p>0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Rompendo em Fé na situação da questão de saúde de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muito abençoada Palavra sobre Perdão no PG.</text:p>
          </table:table-cell>
          <table:table-cell table:number-columns-repeated="1014"/>
        </table:table-row>
        <table:table-row table:style-name="ro13">
          <table:table-cell table:style-name="ce18" table:formula="of:=[.A1638]+1" office:value-type="date" office:date-value="2026-06-02" calcext:value-type="date">
            <text:p>0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39]+1" office:value-type="date" office:date-value="2026-06-03" calcext:value-type="date">
            <text:p>03/06/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Tô triste com a situação de minha esposa e (bem) cansado, porém, Cristo tem sido sempre minha fortalez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40]+1" office:value-type="date" office:date-value="2026-06-04" calcext:value-type="date">
            <text:p>0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descan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41]+1" office:value-type="date" office:date-value="2026-06-05" calcext:value-type="date">
            <text:p>0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Ponte de feriad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2]+1" office:value-type="date" office:date-value="2026-06-06" calcext:value-type="date">
            <text:p>0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Um dia de autocuidado.</text:p>
          </table:table-cell>
          <table:table-cell table:number-columns-repeated="1014"/>
        </table:table-row>
        <table:table-row table:style-name="ro13">
          <table:table-cell table:style-name="ce18" table:formula="of:=[.A1643]+1" office:value-type="date" office:date-value="2026-06-07" calcext:value-type="date">
            <text:p>0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unção e da Graça dO nosso Senhor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44]+1" office:value-type="date" office:date-value="2026-06-08" calcext:value-type="date">
            <text:p>0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645]+1" office:value-type="date" office:date-value="2026-06-09" calcext:value-type="date">
            <text:p>0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a entrega que estava agarrada no trabalho e já peguei outro Bug pra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 dei um descanso.</text:p>
          </table:table-cell>
          <table:table-cell table:number-columns-repeated="1014"/>
        </table:table-row>
        <table:table-row table:style-name="ro2">
          <table:table-cell table:style-name="ce18" table:formula="of:=[.A1646]+1" office:value-type="date" office:date-value="2026-06-10" calcext:value-type="date">
            <text:p>1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47]+1" office:value-type="date" office:date-value="2026-06-11" calcext:value-type="date">
            <text:p>1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identificar muitas oportunidades e colaborar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3" table:number-rows-repeated="1046927">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6-11">00/00/0000</text:date>, <text:time style:data-style-name="N2" text:time-value="19:57:17.36743344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6-11T19:57:48.614671651</dc:date>
    <meta:editing-duration>P1DT17H42M33S</meta:editing-duration>
    <meta:editing-cycles>1644</meta:editing-cycles>
    <meta:document-statistic meta:table-count="1" meta:cell-count="9932" meta:object-count="0"/>
  </office:meta>
</office:document-meta>
</file>