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56" calcext:value-type="float">
            <text:p>1656</text:p>
          </table:table-cell>
          <table:table-cell table:style-name="ce7" table:formula="of:=COUNTIF([.B7:.B999998];&quot;X&quot;)" office:value-type="float" office:value="1457" calcext:value-type="float">
            <text:p>1457</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73" calcext:value-type="float">
            <text:p>17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691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5">00/00/0000</text:date>, <text:time style:data-style-name="N2" text:time-value="20:08:07.9479601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25T20:09:25.051030650</dc:date>
    <meta:editing-duration>P1DT17H58M34S</meta:editing-duration>
    <meta:editing-cycles>1657</meta:editing-cycles>
    <meta:document-statistic meta:table-count="1" meta:cell-count="10016" meta:object-count="0"/>
  </office:meta>
</office:document-meta>
</file>