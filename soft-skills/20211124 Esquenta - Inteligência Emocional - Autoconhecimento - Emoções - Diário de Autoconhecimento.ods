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74" calcext:value-type="float">
            <text:p>1674</text:p>
          </table:table-cell>
          <table:table-cell table:style-name="ce7" table:formula="of:=COUNTIF([.B7:.B999998];&quot;X&quot;)" office:value-type="float" office:value="1472" calcext:value-type="float">
            <text:p>1472</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8" calcext:value-type="float">
            <text:p>10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7" calcext:value-type="float">
            <text:p>187</text:p>
          </table:table-cell>
          <table:table-cell table:style-name="ce25" table:formula="of:=SUM([.B2:.F2])" office:value-type="float" office:value="1795" calcext:value-type="float">
            <text:p>179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75]+1" office:value-type="date" office:date-value="2026-07-09" calcext:value-type="date">
            <text:p>09/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6]+1" office:value-type="date" office:date-value="2026-07-10" calcext:value-type="date">
            <text:p>10/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7]+1" office:value-type="date" office:date-value="2026-07-11" calcext:value-type="date">
            <text:p>1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8]+1" office:value-type="date" office:date-value="2026-07-12" calcext:value-type="date">
            <text:p>1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79]+1" office:value-type="date" office:date-value="2026-07-13" calcext:value-type="date">
            <text:p>13/07/2026</text:p>
          </table:table-cell>
          <table:table-cell table:style-name="ce28" table:number-columns-repeated="4"/>
          <table:table-cell table:style-name="ce28" office:value-type="string" calcext:value-type="string">
            <text:p>X</text:p>
          </table:table-cell>
          <table:table-cell table:style-name="ce42" office:value-type="string" calcext:value-type="string">
            <text:p>Ah Deus, tava tudo indo tão abençoadamente bem mas, porque Senhor, do nada, essa tristeza, essa sensação de fraquez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689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13">00/00/0000</text:date>, <text:time style:data-style-name="N2" text:time-value="23:28:53.9736045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13T23:30:05.436519547</dc:date>
    <meta:editing-duration>P1DT18H13M30S</meta:editing-duration>
    <meta:editing-cycles>1671</meta:editing-cycles>
    <meta:document-statistic meta:table-count="1" meta:cell-count="10128" meta:object-count="0"/>
  </office:meta>
</office:document-meta>
</file>