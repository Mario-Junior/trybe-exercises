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77" calcext:value-type="float">
            <text:p>1677</text:p>
          </table:table-cell>
          <table:table-cell table:style-name="ce7" table:formula="of:=COUNTIF([.B7:.B999998];&quot;X&quot;)" office:value-type="float" office:value="1474" calcext:value-type="float">
            <text:p>1474</text:p>
          </table:table-cell>
          <table:table-cell table:style-name="ce7" table:formula="of:=COUNTIF([.C7:.C999998];&quot;X&quot;)" office:value-type="float" office:value="27" calcext:value-type="float">
            <text:p>27</text:p>
          </table:table-cell>
          <table:table-cell table:style-name="ce7" table:formula="of:=COUNTIF([.D7:.D999998];&quot;X&quot;)" office:value-type="float" office:value="109" calcext:value-type="float">
            <text:p>109</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8" calcext:value-type="float">
            <text:p>188</text:p>
          </table:table-cell>
          <table:table-cell table:style-name="ce25" table:formula="of:=SUM([.B2:.F2])" office:value-type="float" office:value="1799" calcext:value-type="float">
            <text:p>179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2]+1" office:value-type="date" office:date-value="2026-05-17" calcext:value-type="date">
            <text:p>17/05/2026</text:p>
          </table:table-cell>
          <table:table-cell table:style-name="ce28" office:value-type="string" calcext:value-type="string">
            <text:p>X</text:p>
          </table:table-cell>
          <table:table-cell table:style-name="ce28" table:number-columns-repeated="4"/>
          <table:table-cell table:style-name="ce42" office:value-type="string" calcext:value-type="string">
            <text:p>Novo dia cheio de bênçãos e muito alegr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5">
          <table:table-cell table:style-name="ce18" table:formula="of:=[.A1623]+1" office:value-type="date" office:date-value="2026-05-18" calcext:value-type="date">
            <text:p>18/05/2026</text:p>
          </table:table-cell>
          <table:table-cell table:number-columns-repeated="2" table:style-name="ce28" office:value-type="string" calcext:value-type="string">
            <text:p>X</text:p>
          </table:table-cell>
          <table:table-cell table:style-name="ce28" table:number-columns-repeated="3"/>
          <table:table-cell table:style-name="ce42" office:value-type="string" calcext:value-type="string">
            <text:p>Dia com algumas bênçãos, porém, meio agarrado, devido crise de rinite/sinusite e internet da Algar bicha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uita oração abençoadora no PG.</text:p>
          </table:table-cell>
          <table:table-cell table:number-columns-repeated="1014"/>
        </table:table-row>
        <table:table-row table:style-name="ro6">
          <table:table-cell table:style-name="ce18" table:formula="of:=[.A1624]+1" office:value-type="date" office:date-value="2026-05-19" calcext:value-type="date">
            <text:p>1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cuperar um pouco do trabalho agarrado do dia anterior. E, dia de cozinhar comida delici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arne louca.</text:p>
          </table:table-cell>
          <table:table-cell table:number-columns-repeated="1014"/>
        </table:table-row>
        <table:table-row table:style-name="ro2">
          <table:table-cell table:style-name="ce18" table:formula="of:=[.A1625]+1" office:value-type="date" office:date-value="2026-05-20" calcext:value-type="date">
            <text:p>2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26]+1" office:value-type="date" office:date-value="2026-05-21" calcext:value-type="date">
            <text:p>2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ns resultado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7]+1" office:value-type="date" office:date-value="2026-05-22" calcext:value-type="date">
            <text:p>2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28]+1" office:value-type="date" office:date-value="2026-05-23" calcext:value-type="date">
            <text:p>2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6">
          <table:table-cell table:style-name="ce18" table:formula="of:=[.A1629]+1" office:value-type="date" office:date-value="2026-05-24" calcext:value-type="date">
            <text:p>2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usado poderosamente na igreja para o louvor e ministração dA Palavra de Deus.</text:p>
          </table:table-cell>
          <table:table-cell table:number-columns-repeated="1014"/>
        </table:table-row>
        <table:table-row table:style-name="ro13">
          <table:table-cell table:style-name="ce18" table:formula="of:=[.A1630]+1" office:value-type="date" office:date-value="2026-05-25" calcext:value-type="date">
            <text:p>2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31]+1" office:value-type="date" office:date-value="2026-05-26" calcext:value-type="date">
            <text:p>2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desbloqueando mais habil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32]+1" office:value-type="date" office:date-value="2026-05-27" calcext:value-type="date">
            <text:p>2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lguns sustos por dois incidentes e, O Senhor nos sustém e cuida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5">
          <table:table-cell table:style-name="ce18" table:formula="of:=[.A1633]+1" office:value-type="date" office:date-value="2026-05-28" calcext:value-type="date">
            <text:p>2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Tive a honra de conhecer pessoalmente o ilustre Jonatas Maximiano, da Stone. E, recuperando,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5">
          <table:table-cell table:style-name="ce18" table:formula="of:=[.A1634]+1" office:value-type="date" office:date-value="2026-05-29" calcext:value-type="date">
            <text:p>29/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e, pois o procedimento de minha esposa correu bem, porém, com medo, pois, não foi possível extrair tudo e ela terá que volt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35]+1" office:value-type="date" office:date-value="2026-05-30" calcext:value-type="date">
            <text:p>3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ministrei palavras de louvor e adoração.</text:p>
          </table:table-cell>
          <table:table-cell table:number-columns-repeated="1014"/>
        </table:table-row>
        <table:table-row table:style-name="ro13">
          <table:table-cell table:style-name="ce18" table:formula="of:=[.A1636]+1" office:value-type="date" office:date-value="2026-05-31" calcext:value-type="date">
            <text:p>3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pamonha.</text:p>
          </table:table-cell>
          <table:table-cell table:number-columns-repeated="1014"/>
        </table:table-row>
        <table:table-row table:style-name="ro13">
          <table:table-cell table:style-name="ce18" table:formula="of:=[.A1637]+1" office:value-type="date" office:date-value="2026-06-01" calcext:value-type="date">
            <text:p>0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Rompendo em Fé na situação da questão de saúde de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muito abençoada Palavra sobre Perdão no PG.</text:p>
          </table:table-cell>
          <table:table-cell table:number-columns-repeated="1014"/>
        </table:table-row>
        <table:table-row table:style-name="ro13">
          <table:table-cell table:style-name="ce18" table:formula="of:=[.A1638]+1" office:value-type="date" office:date-value="2026-06-02" calcext:value-type="date">
            <text:p>0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39]+1" office:value-type="date" office:date-value="2026-06-03" calcext:value-type="date">
            <text:p>03/06/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Tô triste com a situação de minha esposa e (bem) cansado, porém, Cristo tem sido sempre minha fortalez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40]+1" office:value-type="date" office:date-value="2026-06-04" calcext:value-type="date">
            <text:p>0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descan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41]+1" office:value-type="date" office:date-value="2026-06-05" calcext:value-type="date">
            <text:p>0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Ponte de feriad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2]+1" office:value-type="date" office:date-value="2026-06-06" calcext:value-type="date">
            <text:p>0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Um dia de autocuidado.</text:p>
          </table:table-cell>
          <table:table-cell table:number-columns-repeated="1014"/>
        </table:table-row>
        <table:table-row table:style-name="ro13">
          <table:table-cell table:style-name="ce18" table:formula="of:=[.A1643]+1" office:value-type="date" office:date-value="2026-06-07" calcext:value-type="date">
            <text:p>0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unção e da Graça dO nosso Senhor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44]+1" office:value-type="date" office:date-value="2026-06-08" calcext:value-type="date">
            <text:p>0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45]+1" office:value-type="date" office:date-value="2026-06-09" calcext:value-type="date">
            <text:p>0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a entrega que estava agarrada no trabalho e já peguei outro Bug pra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 dei um descanso.</text:p>
          </table:table-cell>
          <table:table-cell table:number-columns-repeated="1014"/>
        </table:table-row>
        <table:table-row table:style-name="ro2">
          <table:table-cell table:style-name="ce18" table:formula="of:=[.A1646]+1" office:value-type="date" office:date-value="2026-06-10" calcext:value-type="date">
            <text:p>1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47]+1" office:value-type="date" office:date-value="2026-06-11" calcext:value-type="date">
            <text:p>1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identificar muitas oportunidades e colaborar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8]+1" office:value-type="date" office:date-value="2026-06-12" calcext:value-type="date">
            <text:p>1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resolver muitas coisas e sigo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649]+1" office:value-type="date" office:date-value="2026-06-13" calcext:value-type="date">
            <text:p>13/06/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com muita alegria e deliciosos momentos de comunhão em família e com irmã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50]+1" office:value-type="date" office:date-value="2026-06-14" calcext:value-type="date">
            <text:p>1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651]+1" office:value-type="date" office:date-value="2026-06-15" calcext:value-type="date">
            <text:p>1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52]+1" office:value-type="date" office:date-value="2026-06-16" calcext:value-type="date">
            <text:p>1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53]+1" office:value-type="date" office:date-value="2026-06-17" calcext:value-type="date">
            <text:p>1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ssisti ao culto “Sobre A Mesa” e depois ministrei louvores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54]+1" office:value-type="date" office:date-value="2026-06-18" calcext:value-type="date">
            <text:p>1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o nosso querido irmão, amigo e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55]+1" office:value-type="date" office:date-value="2026-06-19" calcext:value-type="date">
            <text:p>1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olhando pra já começar minha pós-graduação Tech.</text:p>
          </table:table-cell>
          <table:table-cell table:number-columns-repeated="1014"/>
        </table:table-row>
        <table:table-row table:style-name="ro10">
          <table:table-cell table:style-name="ce18" table:formula="of:=[.A1656]+1" office:value-type="date" office:date-value="2026-06-20" calcext:value-type="date">
            <text:p>2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muita alegria. Aniversários do nosso irmãozão Elielson e do paizinho dele, comemoração com costelada ao fogo de chão, além do Café de homens com Cristo, onde ministrei e fui ministrado por muitas palavras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57]+1" office:value-type="date" office:date-value="2026-06-21" calcext:value-type="date">
            <text:p>2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58]+1" office:value-type="date" office:date-value="2026-06-22" calcext:value-type="date">
            <text:p>2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as entregas, um 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59]+1" office:value-type="date" office:date-value="2026-06-23" calcext:value-type="date">
            <text:p>23/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danças lindas de minha filha na festinha caipira da escola e estar em família e irmãos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60]+1" office:value-type="date" office:date-value="2026-06-24" calcext:value-type="date">
            <text:p>2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ipoca.</text:p>
          </table:table-cell>
          <table:table-cell table:number-columns-repeated="1014"/>
        </table:table-row>
        <table:table-row table:style-name="ro2">
          <table:table-cell table:style-name="ce18" table:formula="of:=[.A1661]+1" office:value-type="date" office:date-value="2026-06-25" calcext:value-type="date">
            <text:p>2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bom de trabalho e organiz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662]+1" office:value-type="date" office:date-value="2026-06-26" calcext:value-type="date">
            <text:p>2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bom de trabalho e organiz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663]+1" office:value-type="date" office:date-value="2026-06-27" calcext:value-type="date">
            <text:p>27/06/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Correria, trabalhos da faculdade me fazendo dormir mal e pouquíssi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64]+1" office:value-type="date" office:date-value="2026-06-28" calcext:value-type="date">
            <text:p>28/06/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niversário de 72 anos de minha amada Mãe nos proporcionando muita alegria. Porém, os trabalhos da faculdade muito pesados me causando medo de não conseguir entregar e ainda ser reprovado nas disciplin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65]+1" office:value-type="date" office:date-value="2026-06-29" calcext:value-type="date">
            <text:p>29/06/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Passei o dia todo mal, apurado pra conseguir concluir os trabalhos da faculdade, entreguei nos últimos minutos com qualidade bem a quem do que eu gostari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666]+1" office:value-type="date" office:date-value="2026-06-30" calcext:value-type="date">
            <text:p>3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Uma noite melhor dormida e um dia com bom rit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13">
          <table:table-cell table:style-name="ce18" table:formula="of:=[.A1667]+1" office:value-type="date" office:date-value="2026-07-01" calcext:value-type="date">
            <text:p>01/07/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noite melhor dormida e um dia com bom rit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68]+1" office:value-type="date" office:date-value="2026-07-02" calcext:value-type="date">
            <text:p>02/07/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noite melhor dormida e um dia com bom rit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sanduíche assado.</text:p>
          </table:table-cell>
          <table:table-cell table:number-columns-repeated="1014"/>
        </table:table-row>
        <table:table-row table:style-name="ro5">
          <table:table-cell table:style-name="ce18" table:formula="of:=[.A1669]+1" office:value-type="date" office:date-value="2026-07-03" calcext:value-type="date">
            <text:p>03/07/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ia de um bom dia de trabalho e com elogios e medo dos problemas de energia aqui na nossa região, causando muitos transtor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izza.</text:p>
          </table:table-cell>
          <table:table-cell table:number-columns-repeated="1014"/>
        </table:table-row>
        <table:table-row table:style-name="ro13">
          <table:table-cell table:style-name="ce18" table:formula="of:=[.A1670]+1" office:value-type="date" office:date-value="2026-07-04" calcext:value-type="date">
            <text:p>04/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671]+1" office:value-type="date" office:date-value="2026-07-05" calcext:value-type="date">
            <text:p>05/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abençoado e maravilhoso em família e com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72]+1" office:value-type="date" office:date-value="2026-07-06" calcext:value-type="date">
            <text:p>06/07/2026</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o bom, dia repleto de produtiv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73]+1" office:value-type="date" office:date-value="2026-07-07" calcext:value-type="date">
            <text:p>07/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foi um pouquinho bagunçado mas, tudo bem,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13">
          <table:table-cell table:style-name="ce18" table:formula="of:=[.A1674]+1" office:value-type="date" office:date-value="2026-07-08" calcext:value-type="date">
            <text:p>08/07/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75]+1" office:value-type="date" office:date-value="2026-07-09" calcext:value-type="date">
            <text:p>09/07/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76]+1" office:value-type="date" office:date-value="2026-07-10" calcext:value-type="date">
            <text:p>10/07/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77]+1" office:value-type="date" office:date-value="2026-07-11" calcext:value-type="date">
            <text:p>11/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78]+1" office:value-type="date" office:date-value="2026-07-12" calcext:value-type="date">
            <text:p>12/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79]+1" office:value-type="date" office:date-value="2026-07-13" calcext:value-type="date">
            <text:p>13/07/2026</text:p>
          </table:table-cell>
          <table:table-cell table:style-name="ce28" table:number-columns-repeated="4"/>
          <table:table-cell table:style-name="ce28" office:value-type="string" calcext:value-type="string">
            <text:p>X</text:p>
          </table:table-cell>
          <table:table-cell table:style-name="ce42" office:value-type="string" calcext:value-type="string">
            <text:p>Ah Deus, tava tudo indo tão abençoadamente bem mas, porque Senhor, do nada, essa tristeza, essa sensação de fraquez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80]+1" office:value-type="date" office:date-value="2026-07-14" calcext:value-type="date">
            <text:p>14/07/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voluindo as coisas do trabalho porém, com a mente e o corpo sentindo-me frac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81]+1" office:value-type="date" office:date-value="2026-07-15" calcext:value-type="date">
            <text:p>15/07/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me recuperando e evolu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82]+1" office:value-type="date" office:date-value="2026-07-16" calcext:value-type="date">
            <text:p>16/07/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me recuperando e evolu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3" table:number-rows-repeated="1046892">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7-16">00/00/0000</text:date>, <text:time style:data-style-name="N2" text:time-value="20:00:43.73619694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7-16T20:16:05.613181436</dc:date>
    <meta:editing-duration>P1DT18H30M10S</meta:editing-duration>
    <meta:editing-cycles>1674</meta:editing-cycles>
    <meta:document-statistic meta:table-count="1" meta:cell-count="10147" meta:object-count="0"/>
  </office:meta>
</office:document-meta>
</file>