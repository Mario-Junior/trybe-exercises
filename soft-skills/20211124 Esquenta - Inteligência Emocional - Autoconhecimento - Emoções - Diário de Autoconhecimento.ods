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12" calcext:value-type="float">
            <text:p>1612</text:p>
          </table:table-cell>
          <table:table-cell table:style-name="ce7" table:formula="of:=COUNTIF([.B7:.B999998];&quot;X&quot;)" office:value-type="float" office:value="1413" calcext:value-type="float">
            <text:p>1413</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2" calcext:value-type="float">
            <text:p>10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24" calcext:value-type="float">
            <text:p>17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5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2">00/00/0000</text:date>, <text:time style:data-style-name="N2" text:time-value="23:39:20.0517295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12T23:40:36.700724152</dc:date>
    <meta:editing-duration>P1DT17H2M56S</meta:editing-duration>
    <meta:editing-cycles>1611</meta:editing-cycles>
    <meta:document-statistic meta:table-count="1" meta:cell-count="9747" meta:object-count="0"/>
  </office:meta>
</office:document-meta>
</file>